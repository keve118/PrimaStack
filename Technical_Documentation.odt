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  <style:text-properties officeooo:paragraph-rsid="00cdfe17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d20212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d5ac22"/>
    </style:style>
    <style:style style:name="P4" style:family="paragraph" style:parent-style-name="Preformatted_20_Text">
      <style:text-properties officeooo:paragraph-rsid="00f78f92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f78f92"/>
    </style:style>
    <style:style style:name="P6" style:family="paragraph" style:parent-style-name="Text_20_body">
      <style:text-properties officeooo:paragraph-rsid="00f78f92"/>
    </style:style>
    <style:style style:name="P7" style:family="paragraph" style:parent-style-name="Text_20_body">
      <style:text-properties officeooo:paragraph-rsid="00f9682f"/>
    </style:style>
    <style:style style:name="P8" style:family="paragraph" style:parent-style-name="Title">
      <style:text-properties style:font-name="Times New Roman"/>
    </style:style>
    <style:style style:name="P9" style:family="paragraph" style:parent-style-name="Preformatted_20_Text">
      <style:text-properties style:font-name="Times New Roman" officeooo:paragraph-rsid="00f59dfe"/>
    </style:style>
    <style:style style:name="P10" style:family="paragraph" style:parent-style-name="Horizontal_20_Line">
      <style:text-properties style:font-name="Times New Roman"/>
    </style:style>
    <style:style style:name="P11" style:family="paragraph" style:parent-style-name="Preformatted_20_Text">
      <style:paragraph-properties fo:margin-top="0in" fo:margin-bottom="0.1965in" style:contextual-spacing="false"/>
      <style:text-properties style:font-name="Times New Roman" fo:font-size="10pt" officeooo:paragraph-rsid="00c523a5" style:font-size-asian="10pt" style:font-size-complex="10pt"/>
    </style:style>
    <style:style style:name="P12" style:family="paragraph" style:parent-style-name="Preformatted_20_Text">
      <style:paragraph-properties fo:margin-top="0in" fo:margin-bottom="0.1965in" style:contextual-spacing="false"/>
      <style:text-properties style:font-name="Times New Roman" fo:font-size="10pt" officeooo:paragraph-rsid="00cb4366" style:font-size-asian="10pt" style:font-size-complex="10pt"/>
    </style:style>
    <style:style style:name="P13" style:family="paragraph" style:parent-style-name="Text_20_body">
      <style:text-properties style:font-name="Times New Roman" fo:font-size="10pt" officeooo:paragraph-rsid="00f59dfe" style:font-size-asian="10pt" style:font-size-complex="10pt"/>
    </style:style>
    <style:style style:name="P14" style:family="paragraph" style:parent-style-name="Text_20_body">
      <style:text-properties style:font-name="Times New Roman" fo:font-size="10pt" officeooo:paragraph-rsid="00feb74e" style:font-size-asian="10pt" style:font-size-complex="10pt"/>
    </style:style>
    <style:style style:name="P15" style:family="paragraph" style:parent-style-name="Text_20_body">
      <style:text-properties style:font-name="Times New Roman" fo:font-size="10pt" officeooo:rsid="00f59dfe" officeooo:paragraph-rsid="0114ee33" style:font-size-asian="10pt" style:font-size-complex="10pt"/>
    </style:style>
    <style:style style:name="P16" style:family="paragraph" style:parent-style-name="Preformatted_20_Text">
      <style:text-properties style:font-name="Times New Roman" officeooo:paragraph-rsid="00f78f92"/>
    </style:style>
    <style:style style:name="P17" style:family="paragraph" style:parent-style-name="Preformatted_20_Text">
      <style:paragraph-properties fo:margin-top="0in" fo:margin-bottom="0.1965in" style:contextual-spacing="false"/>
      <style:text-properties style:font-name="Times New Roman" officeooo:paragraph-rsid="0082c3a4"/>
    </style:style>
    <style:style style:name="P18" style:family="paragraph" style:parent-style-name="Preformatted_20_Text">
      <style:text-properties style:font-name="Times New Roman" officeooo:rsid="00f59dfe" officeooo:paragraph-rsid="00f59dfe"/>
    </style:style>
    <style:style style:name="P19" style:family="paragraph" style:parent-style-name="Text_20_body">
      <style:text-properties style:font-name="Times New Roman" officeooo:rsid="00f59dfe" officeooo:paragraph-rsid="010f679a"/>
    </style:style>
    <style:style style:name="P20" style:family="paragraph" style:parent-style-name="Preformatted_20_Text">
      <style:text-properties style:font-name="Times New Roman" officeooo:paragraph-rsid="012e251d"/>
    </style:style>
    <style:style style:name="P21" style:family="paragraph" style:parent-style-name="Preformatted_20_Text">
      <style:text-properties style:font-name="Times New Roman" officeooo:paragraph-rsid="01326d05"/>
    </style:style>
    <style:style style:name="P22" style:family="paragraph" style:parent-style-name="Standard">
      <style:text-properties style:font-name="Times New Roman" officeooo:rsid="002aa247" officeooo:paragraph-rsid="002aa247"/>
    </style:style>
    <style:style style:name="P23" style:family="paragraph" style:parent-style-name="Standard">
      <style:text-properties style:font-name="Times New Roman" officeooo:rsid="002b613a" officeooo:paragraph-rsid="002b613a"/>
    </style:style>
    <style:style style:name="P24" style:family="paragraph" style:parent-style-name="Text_20_body">
      <style:text-properties style:font-name="Times New Roman" officeooo:rsid="0014437a" officeooo:paragraph-rsid="0014437a"/>
    </style:style>
    <style:style style:name="P25" style:family="paragraph" style:parent-style-name="Text_20_body">
      <style:text-properties style:font-name="Times New Roman" officeooo:rsid="0014437a" officeooo:paragraph-rsid="00203a6e"/>
    </style:style>
    <style:style style:name="P26" style:family="paragraph" style:parent-style-name="Text_20_body">
      <style:text-properties style:font-name="Times New Roman" officeooo:paragraph-rsid="00374c1d"/>
    </style:style>
    <style:style style:name="P27" style:family="paragraph" style:parent-style-name="Text_20_body">
      <style:text-properties style:font-name="Times New Roman" officeooo:rsid="002174d1" officeooo:paragraph-rsid="002174d1"/>
    </style:style>
    <style:style style:name="P28" style:family="paragraph" style:parent-style-name="Text_20_body">
      <style:text-properties style:font-name="Times New Roman" fo:font-weight="bold" officeooo:rsid="001d0d94" officeooo:paragraph-rsid="001d0d94" style:font-weight-asian="bold" style:font-weight-complex="bold"/>
    </style:style>
    <style:style style:name="P29" style:family="paragraph" style:parent-style-name="Text_20_body">
      <style:text-properties style:font-name="Times New Roman" fo:font-weight="bold" officeooo:rsid="001d0d94" officeooo:paragraph-rsid="0023d47b" style:font-weight-asian="bold" style:font-weight-complex="bold"/>
    </style:style>
    <style:style style:name="P30" style:family="paragraph" style:parent-style-name="Text_20_body">
      <style:text-properties style:font-name="Times New Roman" fo:font-weight="bold" officeooo:rsid="0025a0a6" officeooo:paragraph-rsid="0025a0a6" style:font-weight-asian="bold" style:font-weight-complex="bold"/>
    </style:style>
    <style:style style:name="P31" style:family="paragraph" style:parent-style-name="Text_20_body">
      <style:text-properties style:font-name="Times New Roman" fo:font-weight="bold" officeooo:rsid="00f59dfe" officeooo:paragraph-rsid="00f59dfe" style:font-weight-asian="bold" style:font-weight-complex="bold"/>
    </style:style>
    <style:style style:name="P32" style:family="paragraph" style:parent-style-name="Text_20_body">
      <style:text-properties style:font-name="Times New Roman" fo:font-weight="bold" officeooo:rsid="00fcea8c" officeooo:paragraph-rsid="00fcea8c" style:font-weight-asian="bold" style:font-weight-complex="bold"/>
    </style:style>
    <style:style style:name="P33" style:family="paragraph" style:parent-style-name="Text_20_body">
      <style:text-properties style:font-name="Times New Roman" officeooo:paragraph-rsid="001b361b"/>
    </style:style>
    <style:style style:name="P34" style:family="paragraph" style:parent-style-name="Text_20_body">
      <style:text-properties style:font-name="Times New Roman" officeooo:rsid="0025a0a6" officeooo:paragraph-rsid="002b613a"/>
    </style:style>
    <style:style style:name="P35" style:family="paragraph" style:parent-style-name="Text_20_body">
      <style:text-properties style:font-name="Times New Roman" officeooo:rsid="0025a0a6" officeooo:paragraph-rsid="0036119a"/>
    </style:style>
    <style:style style:name="P36" style:family="paragraph" style:parent-style-name="Text_20_body">
      <style:text-properties style:font-name="Times New Roman" officeooo:rsid="0028a535" officeooo:paragraph-rsid="002b613a"/>
    </style:style>
    <style:style style:name="P37" style:family="paragraph" style:parent-style-name="Standard">
      <style:text-properties style:font-name="Times New Roman" officeooo:rsid="002c831e" officeooo:paragraph-rsid="002c831e"/>
    </style:style>
    <style:style style:name="P38" style:family="paragraph" style:parent-style-name="Standard">
      <style:text-properties style:font-name="Times New Roman" officeooo:rsid="0140b5d4" officeooo:paragraph-rsid="002c831e"/>
    </style:style>
    <style:style style:name="P39" style:family="paragraph" style:parent-style-name="Preformatted_20_Text">
      <style:text-properties officeooo:paragraph-rsid="010f679a"/>
    </style:style>
    <style:style style:name="P4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10f679a"/>
    </style:style>
    <style:style style:name="P41" style:family="paragraph" style:parent-style-name="Text_20_body">
      <style:text-properties officeooo:paragraph-rsid="010f679a"/>
    </style:style>
    <style:style style:name="P42" style:family="paragraph" style:parent-style-name="Preformatted_20_Text">
      <style:paragraph-properties fo:margin-top="0in" fo:margin-bottom="0.1965in" style:contextual-spacing="false"/>
    </style:style>
    <style:style style:name="P43" style:family="paragraph" style:parent-style-name="Preformatted_20_Text">
      <style:text-properties officeooo:rsid="00f59dfe" officeooo:paragraph-rsid="00f59dfe"/>
    </style:style>
    <style:style style:name="P44" style:family="paragraph" style:parent-style-name="Preformatted_20_Text">
      <style:text-properties officeooo:rsid="00f59dfe" officeooo:paragraph-rsid="011757a3"/>
    </style:style>
    <style:style style:name="P45" style:family="paragraph" style:parent-style-name="Preformatted_20_Text">
      <style:paragraph-properties fo:break-before="page"/>
      <style:text-properties officeooo:rsid="00f59dfe" officeooo:paragraph-rsid="011757a3"/>
    </style:style>
    <style:style style:name="P46" style:family="paragraph" style:parent-style-name="Standard">
      <style:text-properties officeooo:rsid="00f59dfe" officeooo:paragraph-rsid="0118531c"/>
    </style:style>
    <style:style style:name="P47" style:family="paragraph" style:parent-style-name="Preformatted_20_Text">
      <style:paragraph-properties fo:margin-top="0in" fo:margin-bottom="0.1965in" style:contextual-spacing="false"/>
      <style:text-properties fo:color="#26a269" loext:opacity="100%" style:font-name="Times New Roman" fo:font-weight="bold" officeooo:paragraph-rsid="00f78f92"/>
    </style:style>
    <style:style style:name="P48" style:family="paragraph" style:parent-style-name="Preformatted_20_Text">
      <style:paragraph-properties fo:margin-top="0in" fo:margin-bottom="0.1965in" style:contextual-spacing="false"/>
      <style:text-properties fo:color="#26a269" loext:opacity="100%" style:font-name="Times New Roman" fo:font-weight="bold" officeooo:paragraph-rsid="01326d05"/>
    </style:style>
    <style:style style:name="P49" style:family="paragraph" style:parent-style-name="Preformatted_20_Text">
      <style:paragraph-properties fo:margin-top="0in" fo:margin-bottom="0.1965in" style:contextual-spacing="false"/>
      <style:text-properties officeooo:paragraph-rsid="011ec813"/>
    </style:style>
    <style:style style:name="P50" style:family="paragraph" style:parent-style-name="Preformatted_20_Text">
      <style:paragraph-properties fo:margin-top="0in" fo:margin-bottom="0.1965in" style:contextual-spacing="false"/>
      <style:text-properties officeooo:paragraph-rsid="012f0e59"/>
    </style:style>
    <style:style style:name="P51" style:family="paragraph" style:parent-style-name="Preformatted_20_Text">
      <style:text-properties officeooo:paragraph-rsid="01326d05"/>
    </style:style>
    <style:style style:name="P52" style:family="paragraph" style:parent-style-name="Text_20_body">
      <style:text-properties officeooo:paragraph-rsid="01326d05"/>
    </style:style>
    <style:style style:name="P53" style:family="paragraph" style:parent-style-name="Preformatted_20_Text">
      <style:paragraph-properties fo:margin-top="0in" fo:margin-bottom="0.1965in" style:contextual-spacing="false"/>
      <style:text-properties officeooo:paragraph-rsid="0135e251"/>
    </style:style>
    <style:style style:name="P54" style:family="paragraph" style:parent-style-name="Text_20_body">
      <style:text-properties officeooo:paragraph-rsid="0118531c"/>
    </style:style>
    <style:style style:name="P55" style:family="paragraph" style:parent-style-name="Preformatted_20_Text">
      <style:paragraph-properties fo:margin-top="0in" fo:margin-bottom="0.1965in" style:contextual-spacing="false"/>
      <style:text-properties officeooo:paragraph-rsid="0138e842"/>
    </style:style>
    <style:style style:name="P56" style:family="paragraph" style:parent-style-name="Preformatted_20_Text">
      <style:paragraph-properties fo:margin-top="0in" fo:margin-bottom="0.1965in" style:contextual-spacing="false" fo:break-before="page"/>
      <style:text-properties officeooo:paragraph-rsid="014f11f1"/>
    </style:style>
    <style:style style:name="P57" style:family="paragraph" style:parent-style-name="Text_20_body" style:list-style-name="">
      <style:text-properties style:font-name="Times New Roman" officeooo:rsid="003b6894" officeooo:paragraph-rsid="003b6894"/>
    </style:style>
    <style:style style:name="P58" style:family="paragraph" style:parent-style-name="Text_20_body" style:list-style-name="">
      <style:text-properties style:font-name="Times New Roman" fo:font-weight="bold" officeooo:rsid="00438f4f" officeooo:paragraph-rsid="0067ed62" style:font-weight-asian="bold" style:font-weight-complex="bold"/>
    </style:style>
    <style:style style:name="P59" style:family="paragraph" style:parent-style-name="Text_20_body" style:list-style-name="">
      <style:text-properties style:font-name="Times New Roman" fo:font-weight="bold" officeooo:rsid="004638ad" officeooo:paragraph-rsid="0067ed62" style:font-weight-asian="bold" style:font-weight-complex="bold"/>
    </style:style>
    <style:style style:name="P60" style:family="paragraph" style:parent-style-name="Text_20_body" style:list-style-name="">
      <style:text-properties style:font-name="Times New Roman" fo:font-weight="bold" officeooo:rsid="00846a45" officeooo:paragraph-rsid="00846a45" style:font-weight-asian="bold" style:font-weight-complex="bold"/>
    </style:style>
    <style:style style:name="P61" style:family="paragraph" style:parent-style-name="Text_20_body" style:list-style-name="">
      <style:text-properties style:font-name="Times New Roman" fo:font-weight="bold" officeooo:rsid="00846a45" officeooo:paragraph-rsid="00912a2f" style:font-weight-asian="bold" style:font-weight-complex="bold"/>
    </style:style>
    <style:style style:name="P62" style:family="paragraph" style:parent-style-name="Text_20_body" style:list-style-name="">
      <style:text-properties style:font-name="Times New Roman" fo:font-weight="bold" officeooo:rsid="00846a45" officeooo:paragraph-rsid="00ae07b3" style:font-weight-asian="bold" style:font-weight-complex="bold"/>
    </style:style>
    <style:style style:name="P63" style:family="paragraph" style:parent-style-name="Text_20_body" style:list-style-name="">
      <style:paragraph-properties fo:break-before="page"/>
      <style:text-properties style:font-name="Times New Roman" fo:font-weight="bold" officeooo:rsid="007c7957" officeooo:paragraph-rsid="007f7ebf" style:font-weight-asian="bold" style:font-weight-complex="bold"/>
    </style:style>
    <style:style style:name="P64" style:family="paragraph" style:parent-style-name="Text_20_body" style:list-style-name="">
      <style:text-properties style:font-name="Times New Roman" officeooo:paragraph-rsid="004638ad"/>
    </style:style>
    <style:style style:name="P65" style:family="paragraph" style:parent-style-name="Text_20_body" style:list-style-name="">
      <style:text-properties style:font-name="Times New Roman" officeooo:paragraph-rsid="004541af"/>
    </style:style>
    <style:style style:name="P66" style:family="paragraph" style:parent-style-name="Text_20_body" style:list-style-name="">
      <style:text-properties style:font-name="Times New Roman" officeooo:paragraph-rsid="0067ed62"/>
    </style:style>
    <style:style style:name="P67" style:family="paragraph" style:parent-style-name="Text_20_body" style:list-style-name="">
      <style:text-properties style:font-name="Times New Roman" officeooo:paragraph-rsid="005b54b1"/>
    </style:style>
    <style:style style:name="P68" style:family="paragraph" style:parent-style-name="Text_20_body" style:list-style-name="">
      <style:text-properties style:font-name="Times New Roman" fo:font-weight="normal" officeooo:rsid="004638ad" officeooo:paragraph-rsid="004638ad" style:font-weight-asian="normal" style:font-weight-complex="normal"/>
    </style:style>
    <style:style style:name="P69" style:family="paragraph" style:parent-style-name="Text_20_body" style:list-style-name="">
      <style:text-properties style:font-name="Times New Roman" fo:font-weight="normal" officeooo:rsid="00846a45" officeooo:paragraph-rsid="00912a2f" style:font-weight-asian="normal" style:font-weight-complex="normal"/>
    </style:style>
    <style:style style:name="P70" style:family="paragraph" style:parent-style-name="Text_20_body" style:list-style-name="">
      <style:text-properties style:font-name="Times New Roman" fo:font-weight="normal" officeooo:rsid="00846a45" officeooo:paragraph-rsid="009ad7af" style:font-weight-asian="normal" style:font-weight-complex="normal"/>
    </style:style>
    <style:style style:name="P71" style:family="paragraph" style:parent-style-name="Text_20_body" style:list-style-name="">
      <style:text-properties style:font-name="Times New Roman" fo:font-size="10pt" officeooo:paragraph-rsid="004638ad" style:font-size-asian="10pt" style:font-size-complex="10pt"/>
    </style:style>
    <style:style style:name="P72" style:family="paragraph" style:parent-style-name="Text_20_body" style:list-style-name="">
      <style:text-properties style:font-name="Times New Roman" fo:font-size="10pt" officeooo:paragraph-rsid="004fbd53" style:font-size-asian="10pt" style:font-size-complex="10pt"/>
    </style:style>
    <style:style style:name="P73" style:family="paragraph" style:parent-style-name="Text_20_body" style:list-style-name="">
      <style:text-properties style:font-name="Times New Roman" fo:font-size="10pt" officeooo:paragraph-rsid="0073a8e4" style:font-size-asian="10pt" style:font-size-complex="10pt"/>
    </style:style>
    <style:style style:name="P74" style:family="paragraph" style:parent-style-name="Text_20_body" style:list-style-name="">
      <style:text-properties style:font-name="Times New Roman" fo:font-size="10pt" officeooo:rsid="006010c7" officeooo:paragraph-rsid="006306b1" style:font-size-asian="10pt" style:font-size-complex="10pt"/>
    </style:style>
    <style:style style:name="P75" style:family="paragraph" style:parent-style-name="Text_20_body" style:list-style-name="">
      <style:text-properties style:font-name="Times New Roman" fo:font-size="10pt" officeooo:rsid="0067ed62" officeooo:paragraph-rsid="007120be" style:font-size-asian="10pt" style:font-size-complex="10pt"/>
    </style:style>
    <style:style style:name="P76" style:family="paragraph" style:parent-style-name="Text_20_body" style:list-style-name="">
      <style:text-properties style:font-name="Times New Roman" fo:font-size="10pt" officeooo:rsid="0067ed62" officeooo:paragraph-rsid="0067ed62" style:font-size-asian="10pt" style:font-size-complex="10pt"/>
    </style:style>
    <style:style style:name="P77" style:family="paragraph" style:parent-style-name="Text_20_body" style:list-style-name="">
      <style:text-properties style:font-name="Times New Roman" fo:font-size="9pt" officeooo:paragraph-rsid="0067ed62" style:font-size-asian="9pt" style:font-size-complex="9pt"/>
    </style:style>
    <style:style style:name="P78" style:family="paragraph" style:parent-style-name="Text_20_body" style:list-style-name="">
      <style:text-properties style:font-name="Times New Roman" officeooo:rsid="006010c7" officeooo:paragraph-rsid="0061cd6b"/>
    </style:style>
    <style:style style:name="P79" style:family="paragraph" style:parent-style-name="Text_20_body" style:list-style-name="">
      <style:paragraph-properties fo:break-before="page"/>
      <style:text-properties style:font-name="Times New Roman" fo:font-size="12pt" officeooo:rsid="0067ed62" officeooo:paragraph-rsid="0067ed62" style:font-size-asian="12pt" style:font-size-complex="12pt"/>
    </style:style>
    <style:style style:name="P80" style:family="paragraph" style:parent-style-name="Text_20_body" style:list-style-name="">
      <style:text-properties style:font-name="Times New Roman" fo:font-size="12pt" officeooo:rsid="0067ed62" officeooo:paragraph-rsid="0067ed62" style:font-size-asian="12pt" style:font-size-complex="12pt"/>
    </style:style>
    <style:style style:name="P81" style:family="paragraph" style:parent-style-name="Text_20_body" style:list-style-name="">
      <style:text-properties style:font-name="Times New Roman" fo:font-size="12pt" officeooo:rsid="0067ed62" officeooo:paragraph-rsid="00703c8c" style:font-size-asian="12pt" style:font-size-complex="12pt"/>
    </style:style>
    <style:style style:name="P82" style:family="paragraph" style:parent-style-name="Text_20_body" style:list-style-name="">
      <style:text-properties style:font-name="Times New Roman" fo:font-size="12pt" officeooo:rsid="00690a48" officeooo:paragraph-rsid="00690a48" style:font-size-asian="12pt" style:font-size-complex="12pt"/>
    </style:style>
    <style:style style:name="P83" style:family="paragraph" style:parent-style-name="Text_20_body" style:list-style-name="">
      <style:text-properties style:font-name="Times New Roman" fo:font-size="12pt" officeooo:rsid="007b74d6" officeooo:paragraph-rsid="007b74d6" style:font-size-asian="12pt" style:font-size-complex="12pt"/>
    </style:style>
    <style:style style:name="P84" style:family="paragraph" style:parent-style-name="Text_20_body" style:list-style-name="">
      <style:text-properties style:font-name="Times New Roman" fo:font-size="12pt" fo:font-style="italic" style:text-underline-style="none" officeooo:rsid="0067ed62" officeooo:paragraph-rsid="0067ed62" style:font-size-asian="12pt" style:font-style-asian="italic" style:font-size-complex="12pt" style:font-style-complex="italic"/>
    </style:style>
    <style:style style:name="P85" style:family="paragraph" style:parent-style-name="Text_20_body" style:list-style-name="">
      <style:text-properties style:font-name="Times New Roman" fo:font-size="12pt" fo:font-style="italic" officeooo:rsid="0067ed62" officeooo:paragraph-rsid="00703c8c" style:font-size-asian="12pt" style:font-style-asian="italic" style:font-size-complex="12pt" style:font-style-complex="italic"/>
    </style:style>
    <style:style style:name="P86" style:family="paragraph" style:parent-style-name="Text_20_body" style:list-style-name="">
      <style:text-properties style:font-name="Times New Roman" officeooo:rsid="007c7957" officeooo:paragraph-rsid="007c7957"/>
    </style:style>
    <style:style style:name="P87" style:family="paragraph" style:parent-style-name="Text_20_body" style:list-style-name="">
      <style:text-properties style:font-name="Times New Roman" officeooo:rsid="007c7957" officeooo:paragraph-rsid="00e40a89"/>
    </style:style>
    <style:style style:name="P88" style:family="paragraph" style:parent-style-name="Text_20_body" style:list-style-name="">
      <style:text-properties style:font-name="Times New Roman" officeooo:rsid="007c7957" officeooo:paragraph-rsid="00e5d1d3"/>
    </style:style>
    <style:style style:name="P89" style:family="paragraph" style:parent-style-name="Text_20_body" style:list-style-name="">
      <style:text-properties style:font-name="Times New Roman" officeooo:rsid="007c7957" officeooo:paragraph-rsid="0135e251"/>
    </style:style>
    <style:style style:name="P90" style:family="paragraph" style:parent-style-name="Text_20_body" style:list-style-name="">
      <style:text-properties style:font-name="Times New Roman" officeooo:rsid="007c7957" officeooo:paragraph-rsid="01560de9"/>
    </style:style>
    <style:style style:name="P91" style:family="paragraph" style:parent-style-name="Text_20_body" style:list-style-name="">
      <style:text-properties style:font-name="Times New Roman" officeooo:rsid="007c7957" officeooo:paragraph-rsid="015e486c"/>
    </style:style>
    <style:style style:name="P92" style:family="paragraph" style:parent-style-name="Text_20_body" style:list-style-name="">
      <style:text-properties style:font-name="Times New Roman" officeooo:rsid="007c7957" officeooo:paragraph-rsid="01631db8"/>
    </style:style>
    <style:style style:name="P93" style:family="paragraph" style:parent-style-name="Text_20_body" style:list-style-name="">
      <style:text-properties style:font-name="Times New Roman" officeooo:rsid="00846a45" officeooo:paragraph-rsid="010f679a"/>
    </style:style>
    <style:style style:name="P94" style:family="paragraph" style:parent-style-name="Text_20_body" style:list-style-name="">
      <style:text-properties officeooo:paragraph-rsid="004541af"/>
    </style:style>
    <style:style style:name="P95" style:family="paragraph" style:parent-style-name="Text_20_body" style:list-style-name="">
      <style:text-properties officeooo:paragraph-rsid="004638ad"/>
    </style:style>
    <style:style style:name="P96" style:family="paragraph" style:parent-style-name="Text_20_body" style:list-style-name="">
      <style:text-properties officeooo:paragraph-rsid="007c7957"/>
    </style:style>
    <style:style style:name="P97" style:family="paragraph" style:parent-style-name="Text_20_body" style:list-style-name="">
      <style:text-properties officeooo:paragraph-rsid="0084471c"/>
    </style:style>
    <style:style style:name="P98" style:family="paragraph" style:parent-style-name="Text_20_body" style:list-style-name="">
      <style:text-properties officeooo:paragraph-rsid="00846a45"/>
    </style:style>
    <style:style style:name="P99" style:family="paragraph" style:parent-style-name="Text_20_body" style:list-style-name="">
      <style:text-properties officeooo:paragraph-rsid="00f0447a"/>
    </style:style>
    <style:style style:name="P100" style:family="paragraph" style:parent-style-name="Text_20_body" style:list-style-name="">
      <style:text-properties officeooo:paragraph-rsid="00a3dcf8"/>
    </style:style>
    <style:style style:name="P101" style:family="paragraph" style:parent-style-name="Text_20_body" style:list-style-name="">
      <style:text-properties officeooo:paragraph-rsid="00a90b13"/>
    </style:style>
    <style:style style:name="P102" style:family="paragraph" style:parent-style-name="Text_20_body" style:list-style-name="">
      <style:text-properties officeooo:paragraph-rsid="00b6a90b"/>
    </style:style>
    <style:style style:name="P103" style:family="paragraph" style:parent-style-name="Text_20_body" style:list-style-name="">
      <style:text-properties officeooo:paragraph-rsid="00baf6ad"/>
    </style:style>
    <style:style style:name="P104" style:family="paragraph" style:parent-style-name="Text_20_body" style:list-style-name="">
      <style:text-properties officeooo:paragraph-rsid="00c3b916"/>
    </style:style>
    <style:style style:name="P105" style:family="paragraph" style:parent-style-name="Text_20_body" style:list-style-name="">
      <style:text-properties officeooo:paragraph-rsid="007f7ebf"/>
    </style:style>
    <style:style style:name="P106" style:family="paragraph" style:parent-style-name="Text_20_body" style:list-style-name="">
      <style:text-properties officeooo:paragraph-rsid="00b1633c"/>
    </style:style>
    <style:style style:name="P107" style:family="paragraph" style:parent-style-name="Text_20_body" style:list-style-name="">
      <style:text-properties officeooo:paragraph-rsid="00a34c0d"/>
    </style:style>
    <style:style style:name="P108" style:family="paragraph" style:parent-style-name="Text_20_body" style:list-style-name="">
      <style:text-properties officeooo:paragraph-rsid="00b2e3e6"/>
    </style:style>
    <style:style style:name="P109" style:family="paragraph" style:parent-style-name="Text_20_body" style:list-style-name="">
      <style:text-properties officeooo:paragraph-rsid="010f679a"/>
    </style:style>
    <style:style style:name="P110" style:family="paragraph" style:parent-style-name="Text_20_body" style:list-style-name="">
      <style:text-properties officeooo:paragraph-rsid="0165c8c6"/>
    </style:style>
    <style:style style:name="P111" style:family="paragraph" style:parent-style-name="Text_20_body" style:list-style-name="">
      <style:text-properties officeooo:paragraph-rsid="01560de9"/>
    </style:style>
    <style:style style:name="P112" style:family="paragraph" style:parent-style-name="Text_20_body" style:list-style-name="">
      <style:text-properties fo:font-weight="bold" officeooo:rsid="00846a45" officeooo:paragraph-rsid="00846a45" style:font-weight-asian="bold" style:font-weight-complex="bold"/>
    </style:style>
    <style:style style:name="P113" style:family="paragraph" style:parent-style-name="Text_20_body" style:list-style-name="">
      <style:text-properties fo:font-weight="bold" officeooo:rsid="00846a45" officeooo:paragraph-rsid="00a85922" style:font-weight-asian="bold" style:font-weight-complex="bold"/>
    </style:style>
    <style:style style:name="P114" style:family="paragraph" style:parent-style-name="Text_20_body" style:list-style-name="">
      <style:text-properties fo:font-weight="normal" officeooo:rsid="00846a45" officeooo:paragraph-rsid="00ae07b3" style:font-weight-asian="normal" style:font-weight-complex="normal"/>
    </style:style>
    <style:style style:name="P115" style:family="paragraph" style:parent-style-name="Preformatted_20_Text" style:list-style-name="">
      <style:text-properties style:font-name="Times New Roman" officeooo:rsid="007c7957" officeooo:paragraph-rsid="007c7957"/>
    </style:style>
    <style:style style:name="P116" style:family="paragraph" style:parent-style-name="Preformatted_20_Text" style:list-style-name="">
      <style:text-properties officeooo:paragraph-rsid="00c3b916"/>
    </style:style>
    <style:style style:name="P117" style:family="paragraph" style:parent-style-name="Preformatted_20_Text" style:list-style-name="">
      <style:text-properties officeooo:paragraph-rsid="010f679a"/>
    </style:style>
    <style:style style:name="P118" style:family="paragraph" style:parent-style-name="Heading_20_1">
      <style:text-properties style:font-name="Times New Roman"/>
    </style:style>
    <style:style style:name="P119" style:family="paragraph" style:parent-style-name="Heading_20_1">
      <style:paragraph-properties fo:break-before="page"/>
      <style:text-properties style:font-name="Times New Roman"/>
    </style:style>
    <style:style style:name="P120" style:family="paragraph" style:parent-style-name="Heading_20_1">
      <style:paragraph-properties fo:break-before="page"/>
      <style:text-properties style:font-name="Times New Roman" officeooo:paragraph-rsid="00f59dfe"/>
    </style:style>
    <style:style style:name="P121" style:family="paragraph" style:parent-style-name="Heading_20_2">
      <style:text-properties style:font-name="Times New Roman"/>
    </style:style>
    <style:style style:name="P122" style:family="paragraph" style:parent-style-name="Heading_20_2" style:list-style-name="">
      <style:text-properties style:font-name="Times New Roman" officeooo:rsid="003b6894" officeooo:paragraph-rsid="003b6894"/>
    </style:style>
    <style:style style:name="P123" style:family="paragraph" style:parent-style-name="Heading_20_2">
      <style:paragraph-properties fo:break-before="page"/>
      <style:text-properties style:font-name="Times New Roman"/>
    </style:style>
    <style:style style:name="T1" style:family="text">
      <style:text-properties officeooo:rsid="0014437a"/>
    </style:style>
    <style:style style:name="T2" style:family="text">
      <style:text-properties officeooo:rsid="0015593e"/>
    </style:style>
    <style:style style:name="T3" style:family="text">
      <style:text-properties officeooo:rsid="00193001"/>
    </style:style>
    <style:style style:name="T4" style:family="text">
      <style:text-properties officeooo:rsid="00203a6e"/>
    </style:style>
    <style:style style:name="T5" style:family="text">
      <style:text-properties officeooo:rsid="00206bfe"/>
    </style:style>
    <style:style style:name="T6" style:family="text">
      <style:text-properties officeooo:rsid="0022badf"/>
    </style:style>
    <style:style style:name="T7" style:family="text">
      <style:text-properties officeooo:rsid="0023d47b"/>
    </style:style>
    <style:style style:name="T8" style:family="text">
      <style:text-properties officeooo:rsid="0026b862"/>
    </style:style>
    <style:style style:name="T9" style:family="text">
      <style:text-properties officeooo:rsid="0028a535"/>
    </style:style>
    <style:style style:name="T10" style:family="text">
      <style:text-properties officeooo:rsid="0371e2e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371e2ee" style:font-weight-asian="normal" style:font-weight-complex="normal"/>
    </style:style>
    <style:style style:name="T13" style:family="text">
      <style:text-properties fo:font-weight="normal" officeooo:rsid="0027585f" style:font-weight-asian="normal" style:font-weight-complex="normal"/>
    </style:style>
    <style:style style:name="T14" style:family="text">
      <style:text-properties fo:font-weight="normal" officeooo:rsid="00284207" style:font-weight-asian="normal" style:font-weight-complex="normal"/>
    </style:style>
    <style:style style:name="T15" style:family="text">
      <style:text-properties fo:font-weight="normal" officeooo:rsid="0082c3a4" style:font-weight-asian="normal" style:font-weight-complex="normal"/>
    </style:style>
    <style:style style:name="T16" style:family="text">
      <style:text-properties fo:font-weight="normal" officeooo:rsid="011757a3" style:font-weight-asian="normal" style:font-weight-complex="normal"/>
    </style:style>
    <style:style style:name="T17" style:family="text">
      <style:text-properties fo:font-weight="normal" officeooo:rsid="00e5d1d3" style:font-weight-asian="normal" style:font-weight-complex="normal"/>
    </style:style>
    <style:style style:name="T18" style:family="text">
      <style:text-properties officeooo:rsid="002be47d"/>
    </style:style>
    <style:style style:name="T19" style:family="text">
      <style:text-properties officeooo:rsid="002fec48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541af" style:font-weight-asian="bold" style:font-weight-complex="bold"/>
    </style:style>
    <style:style style:name="T22" style:family="text">
      <style:text-properties fo:font-weight="bold" officeooo:rsid="0067ed62" style:font-weight-asian="bold" style:font-weight-complex="bold"/>
    </style:style>
    <style:style style:name="T23" style:family="text">
      <style:text-properties fo:font-weight="bold" officeooo:rsid="00e2e4fb" style:font-weight-asian="bold" style:font-weight-complex="bold"/>
    </style:style>
    <style:style style:name="T24" style:family="text">
      <style:text-properties fo:font-weight="bold" officeooo:rsid="0082c3a4" style:font-weight-asian="bold" style:font-weight-complex="bold"/>
    </style:style>
    <style:style style:name="T25" style:family="text">
      <style:text-properties fo:font-weight="bold" officeooo:rsid="00f6b862" style:font-weight-asian="bold" style:font-weight-complex="bold"/>
    </style:style>
    <style:style style:name="T26" style:family="text">
      <style:text-properties fo:font-weight="bold" officeooo:rsid="007c7957" style:font-weight-asian="bold" style:font-weight-complex="bold"/>
    </style:style>
    <style:style style:name="T27" style:family="text">
      <style:text-properties fo:font-weight="bold" officeooo:rsid="00910135" style:font-weight-asian="bold" style:font-weight-complex="bold"/>
    </style:style>
    <style:style style:name="T28" style:family="text">
      <style:text-properties fo:font-weight="bold" officeooo:rsid="00e5d1d3" style:font-weight-asian="bold" style:font-weight-complex="bold"/>
    </style:style>
    <style:style style:name="T29" style:family="text">
      <style:text-properties fo:font-weight="bold" officeooo:rsid="00e40a89" style:font-weight-asian="bold" style:font-weight-complex="bold"/>
    </style:style>
    <style:style style:name="T30" style:family="text">
      <style:text-properties fo:font-weight="bold" officeooo:rsid="013a6153" style:font-weight-asian="bold" style:font-weight-complex="bold"/>
    </style:style>
    <style:style style:name="T31" style:family="text">
      <style:text-properties fo:font-weight="bold" officeooo:rsid="011533ca" style:font-weight-asian="bold" style:font-weight-complex="bold"/>
    </style:style>
    <style:style style:name="T32" style:family="text">
      <style:text-properties fo:font-weight="bold" officeooo:rsid="01601784" style:font-weight-asian="bold" style:font-weight-complex="bold"/>
    </style:style>
    <style:style style:name="T33" style:family="text">
      <style:text-properties fo:font-style="italic" officeooo:rsid="0048f2bb" style:font-style-asian="italic" style:font-style-complex="italic"/>
    </style:style>
    <style:style style:name="T34" style:family="text">
      <style:text-properties fo:font-style="italic" fo:font-weight="bold" officeooo:rsid="0033723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5aac54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5de47a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5d21c4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5e1a6a" style:font-style-asian="italic" style:font-weight-asian="bold" style:font-style-complex="italic" style:font-weight-complex="bold"/>
    </style:style>
    <style:style style:name="T39" style:family="text">
      <style:text-properties fo:font-style="italic" fo:font-weight="normal" officeooo:rsid="0048f2bb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61cd6b" style:font-style-asian="italic" style:font-weight-asian="normal" style:font-style-complex="italic" style:font-weight-complex="normal"/>
    </style:style>
    <style:style style:name="T41" style:family="text">
      <style:text-properties fo:font-style="italic" style:text-underline-style="none" officeooo:rsid="006d13e6" style:font-style-asian="italic" style:font-style-complex="italic"/>
    </style:style>
    <style:style style:name="T42" style:family="text">
      <style:text-properties officeooo:rsid="0036af79"/>
    </style:style>
    <style:style style:name="T43" style:family="text">
      <style:text-properties officeooo:rsid="00380e5d"/>
    </style:style>
    <style:style style:name="T44" style:family="text">
      <style:text-properties officeooo:rsid="003937de"/>
    </style:style>
    <style:style style:name="T45" style:family="text">
      <style:text-properties officeooo:rsid="003b6894"/>
    </style:style>
    <style:style style:name="T46" style:family="text">
      <style:text-properties officeooo:rsid="003b91e2"/>
    </style:style>
    <style:style style:name="T47" style:family="text">
      <style:text-properties officeooo:rsid="003d48ff"/>
    </style:style>
    <style:style style:name="T48" style:family="text">
      <style:text-properties officeooo:rsid="003df25f"/>
    </style:style>
    <style:style style:name="T49" style:family="text">
      <style:text-properties officeooo:rsid="00401a97"/>
    </style:style>
    <style:style style:name="T50" style:family="text">
      <style:text-properties officeooo:rsid="0041f18e"/>
    </style:style>
    <style:style style:name="T51" style:family="text">
      <style:text-properties officeooo:rsid="00438f4f"/>
    </style:style>
    <style:style style:name="T52" style:family="text">
      <style:text-properties officeooo:rsid="00451ecb"/>
    </style:style>
    <style:style style:name="T53" style:family="text">
      <style:text-properties officeooo:rsid="004541af"/>
    </style:style>
    <style:style style:name="T54" style:family="text">
      <style:text-properties officeooo:rsid="0048f2bb"/>
    </style:style>
    <style:style style:name="T55" style:family="text">
      <style:text-properties fo:font-style="normal" officeooo:rsid="004a37d6" style:font-style-asian="normal" style:font-style-complex="normal"/>
    </style:style>
    <style:style style:name="T56" style:family="text">
      <style:text-properties fo:font-style="normal" officeooo:rsid="004befdc" style:font-style-asian="normal" style:font-style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52eb64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61cd6b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541b34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550fcf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d00ffa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bold" officeooo:rsid="005800e6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562c0d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5d21c4" style:font-style-asian="normal" style:font-weight-asian="bold" style:font-style-complex="normal" style:font-weight-complex="bold"/>
    </style:style>
    <style:style style:name="T66" style:family="text">
      <style:text-properties fo:font-style="normal" style:text-underline-style="none" officeooo:rsid="006d13e6" style:font-style-asian="normal" style:font-style-complex="normal"/>
    </style:style>
    <style:style style:name="T67" style:family="text">
      <style:text-properties officeooo:rsid="004fbd53"/>
    </style:style>
    <style:style style:name="T68" style:family="text">
      <style:text-properties officeooo:rsid="004ff75a"/>
    </style:style>
    <style:style style:name="T69" style:family="text">
      <style:text-properties officeooo:rsid="0050776a"/>
    </style:style>
    <style:style style:name="T70" style:family="text">
      <style:text-properties officeooo:rsid="00520f33"/>
    </style:style>
    <style:style style:name="T71" style:family="text">
      <style:text-properties officeooo:rsid="0052cc18"/>
    </style:style>
    <style:style style:name="T72" style:family="text">
      <style:text-properties officeooo:rsid="005aac54"/>
    </style:style>
    <style:style style:name="T73" style:family="text">
      <style:text-properties officeooo:rsid="0067ed62"/>
    </style:style>
    <style:style style:name="T74" style:family="text">
      <style:text-properties officeooo:rsid="00690a48"/>
    </style:style>
    <style:style style:name="T75" style:family="text">
      <style:text-properties officeooo:rsid="00706908"/>
    </style:style>
    <style:style style:name="T76" style:family="text">
      <style:text-properties officeooo:rsid="0073a8e4"/>
    </style:style>
    <style:style style:name="T77" style:family="text">
      <style:text-properties officeooo:rsid="00750d33"/>
    </style:style>
    <style:style style:name="T78" style:family="text">
      <style:text-properties officeooo:rsid="007c7957"/>
    </style:style>
    <style:style style:name="T79" style:family="text">
      <style:text-properties fo:font-size="10pt" fo:font-weight="normal" style:font-size-asian="10pt" style:font-weight-asian="normal" style:font-size-complex="10pt" style:font-weight-complex="normal"/>
    </style:style>
    <style:style style:name="T80" style:family="text">
      <style:text-properties fo:font-size="10pt" fo:font-weight="normal" officeooo:rsid="00e5d1d3" style:font-size-asian="10pt" style:font-weight-asian="normal" style:font-size-complex="10pt" style:font-weight-complex="normal"/>
    </style:style>
    <style:style style:name="T81" style:family="text">
      <style:text-properties fo:font-size="10pt" fo:font-weight="normal" officeooo:rsid="00e74568" style:font-size-asian="10pt" style:font-weight-asian="normal" style:font-size-complex="10pt" style:font-weight-complex="normal"/>
    </style:style>
    <style:style style:name="T82" style:family="text">
      <style:text-properties fo:font-size="10pt" fo:font-weight="normal" officeooo:rsid="014a6cbd" style:font-size-asian="10pt" style:font-weight-asian="normal" style:font-size-complex="10pt" style:font-weight-complex="normal"/>
    </style:style>
    <style:style style:name="T83" style:family="text">
      <style:text-properties fo:font-size="10pt" fo:font-weight="normal" officeooo:rsid="0165c8c6" style:font-size-asian="10pt" style:font-weight-asian="normal" style:font-size-complex="10pt" style:font-weight-complex="normal"/>
    </style:style>
    <style:style style:name="T84" style:family="text">
      <style:text-properties officeooo:rsid="007f7ebf"/>
    </style:style>
    <style:style style:name="T85" style:family="text">
      <style:text-properties officeooo:rsid="0080bfd3"/>
    </style:style>
    <style:style style:name="T86" style:family="text">
      <style:text-properties style:text-position="super 58%"/>
    </style:style>
    <style:style style:name="T87" style:family="text">
      <style:text-properties style:text-position="super 58%" officeooo:rsid="00912a2f"/>
    </style:style>
    <style:style style:name="T88" style:family="text">
      <style:text-properties style:text-position="super 58%" officeooo:rsid="00b43fb9"/>
    </style:style>
    <style:style style:name="T89" style:family="text">
      <style:text-properties style:text-position="super 58%" fo:font-weight="bold" style:font-weight-asian="bold" style:font-weight-complex="bold"/>
    </style:style>
    <style:style style:name="T90" style:family="text">
      <style:text-properties style:text-position="super 58%" style:font-name="Times New Roman" fo:font-size="10pt" fo:font-weight="bold" style:font-size-asian="10pt" style:font-weight-asian="bold" style:font-size-complex="10pt" style:font-weight-complex="bold"/>
    </style:style>
    <style:style style:name="T91" style:family="text">
      <style:text-properties style:text-position="super 58%" style:font-name="Times New Roman" fo:font-size="10pt" fo:font-weight="bold" officeooo:rsid="00a8b448" style:font-size-asian="10pt" style:font-weight-asian="bold" style:font-size-complex="10pt" style:font-weight-complex="bold"/>
    </style:style>
    <style:style style:name="T92" style:family="text">
      <style:text-properties style:text-position="super 58%" style:font-name="Times New Roman" fo:font-size="10pt" fo:font-weight="bold" officeooo:rsid="00b94d32" style:font-size-asian="10pt" style:font-weight-asian="bold" style:font-size-complex="10pt" style:font-weight-complex="bold"/>
    </style:style>
    <style:style style:name="T93" style:family="text">
      <style:text-properties officeooo:rsid="008f581c"/>
    </style:style>
    <style:style style:name="T94" style:family="text">
      <style:text-properties officeooo:rsid="00cb4366"/>
    </style:style>
    <style:style style:name="T95" style:family="text">
      <style:text-properties officeooo:rsid="00cce034"/>
    </style:style>
    <style:style style:name="T96" style:family="text">
      <style:text-properties fo:color="#26a269" loext:opacity="100%" style:font-name="Times New Roman" fo:font-weight="bold"/>
    </style:style>
    <style:style style:name="T97" style:family="text">
      <style:text-properties fo:color="#2aa1b3" loext:opacity="100%"/>
    </style:style>
    <style:style style:name="T98" style:family="text">
      <style:text-properties fo:color="#2aa1b3" loext:opacity="100%" style:font-name="Times New Roman"/>
    </style:style>
    <style:style style:name="T99" style:family="text">
      <style:text-properties fo:color="#a2734c" loext:opacity="100%" fo:font-weight="bold"/>
    </style:style>
    <style:style style:name="T100" style:family="text">
      <style:text-properties fo:color="#a2734c" loext:opacity="100%" fo:font-weight="bold" officeooo:rsid="01326d05"/>
    </style:style>
    <style:style style:name="T101" style:family="text">
      <style:text-properties fo:color="#a2734c" loext:opacity="100%" fo:font-weight="bold" officeooo:rsid="012f701b"/>
    </style:style>
    <style:style style:name="T102" style:family="text">
      <style:text-properties fo:color="#a2734c" loext:opacity="100%" style:font-name="Times New Roman" fo:font-weight="bold"/>
    </style:style>
    <style:style style:name="T103" style:family="text">
      <style:text-properties fo:color="#a2734c" loext:opacity="100%" style:font-name="Times New Roman" fo:font-weight="bold" officeooo:rsid="00a34c0d" style:font-weight-asian="bold" style:font-weight-complex="bold"/>
    </style:style>
    <style:style style:name="T104" style:family="text">
      <style:text-properties fo:color="#000000" loext:opacity="100%" style:font-name="Times New Roman" fo:font-weight="bold" officeooo:rsid="00a34c0d" style:font-weight-asian="bold" style:font-weight-complex="bold"/>
    </style:style>
    <style:style style:name="T105" style:family="text">
      <style:text-properties fo:color="#000000" loext:opacity="100%" style:font-name="Times New Roman" fo:font-size="10pt" fo:font-style="normal" fo:font-weight="normal" officeooo:rsid="00d20212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font-name="Times New Roman" fo:font-size="10pt" fo:font-style="normal" fo:font-weight="normal" officeooo:rsid="014f11f1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officeooo:rsid="00e7ae33"/>
    </style:style>
    <style:style style:name="T108" style:family="text">
      <style:text-properties officeooo:rsid="00e942c8"/>
    </style:style>
    <style:style style:name="T109" style:family="text">
      <style:text-properties officeooo:rsid="00f59dfe"/>
    </style:style>
    <style:style style:name="T110" style:family="text">
      <style:text-properties style:font-name="Times New Roman"/>
    </style:style>
    <style:style style:name="T11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2" style:family="text">
      <style:text-properties style:font-name="Times New Roman" fo:font-size="10pt" fo:font-weight="normal" officeooo:rsid="0084471c" style:font-size-asian="10pt" style:font-weight-asian="normal" style:font-size-complex="10pt" style:font-weight-complex="normal"/>
    </style:style>
    <style:style style:name="T113" style:family="text">
      <style:text-properties style:font-name="Times New Roman" fo:font-size="10pt" fo:font-weight="normal" officeooo:rsid="010c0edc" style:font-size-asian="10pt" style:font-weight-asian="normal" style:font-size-complex="10pt" style:font-weight-complex="normal"/>
    </style:style>
    <style:style style:name="T114" style:family="text">
      <style:text-properties style:font-name="Times New Roman" fo:font-size="10pt" fo:font-weight="normal" officeooo:rsid="00919dcc" style:font-size-asian="10pt" style:font-weight-asian="normal" style:font-size-complex="10pt" style:font-weight-complex="normal"/>
    </style:style>
    <style:style style:name="T115" style:family="text">
      <style:text-properties style:font-name="Times New Roman" fo:font-size="10pt" fo:font-weight="normal" officeooo:rsid="00ea36b1" style:font-size-asian="10pt" style:font-weight-asian="normal" style:font-size-complex="10pt" style:font-weight-complex="normal"/>
    </style:style>
    <style:style style:name="T116" style:family="text">
      <style:text-properties style:font-name="Times New Roman" fo:font-size="10pt" fo:font-weight="normal" officeooo:rsid="007c7957" style:font-size-asian="10pt" style:font-weight-asian="normal" style:font-size-complex="10pt" style:font-weight-complex="normal"/>
    </style:style>
    <style:style style:name="T117" style:family="text">
      <style:text-properties style:font-name="Times New Roman" fo:font-size="10pt" fo:font-weight="normal" officeooo:rsid="007e2c21" style:font-size-asian="10pt" style:font-weight-asian="normal" style:font-size-complex="10pt" style:font-weight-complex="normal"/>
    </style:style>
    <style:style style:name="T118" style:family="text">
      <style:text-properties style:font-name="Times New Roman" fo:font-size="10pt" fo:font-weight="normal" officeooo:rsid="00f3248a" style:font-size-asian="10pt" style:font-weight-asian="normal" style:font-size-complex="10pt" style:font-weight-complex="normal"/>
    </style:style>
    <style:style style:name="T119" style:family="text">
      <style:text-properties style:font-name="Times New Roman" fo:font-size="10pt" fo:font-weight="normal" officeooo:rsid="008fd1ca" style:font-size-asian="10pt" style:font-weight-asian="normal" style:font-size-complex="10pt" style:font-weight-complex="normal"/>
    </style:style>
    <style:style style:name="T120" style:family="text">
      <style:text-properties style:font-name="Times New Roman" fo:font-size="10pt" fo:font-weight="normal" officeooo:rsid="00a3dcf8" style:font-size-asian="10pt" style:font-weight-asian="normal" style:font-size-complex="10pt" style:font-weight-complex="normal"/>
    </style:style>
    <style:style style:name="T121" style:family="text">
      <style:text-properties style:font-name="Times New Roman" fo:font-size="10pt" fo:font-weight="normal" officeooo:rsid="00a34c0d" style:font-size-asian="10pt" style:font-weight-asian="normal" style:font-size-complex="10pt" style:font-weight-complex="normal"/>
    </style:style>
    <style:style style:name="T122" style:family="text">
      <style:text-properties style:font-name="Times New Roman" fo:font-size="10pt" fo:font-weight="normal" officeooo:rsid="00afb55d" style:font-size-asian="10pt" style:font-weight-asian="normal" style:font-size-complex="10pt" style:font-weight-complex="normal"/>
    </style:style>
    <style:style style:name="T123" style:family="text">
      <style:text-properties style:font-name="Times New Roman" fo:font-size="10pt" fo:font-weight="normal" officeooo:rsid="00b2e3e6" style:font-size-asian="10pt" style:font-weight-asian="normal" style:font-size-complex="10pt" style:font-weight-complex="normal"/>
    </style:style>
    <style:style style:name="T124" style:family="text">
      <style:text-properties style:font-name="Times New Roman" fo:font-size="10pt" fo:font-weight="normal" officeooo:rsid="00b2110c" style:font-size-asian="10pt" style:font-weight-asian="normal" style:font-size-complex="10pt" style:font-weight-complex="normal"/>
    </style:style>
    <style:style style:name="T125" style:family="text">
      <style:text-properties style:font-name="Times New Roman" fo:font-size="10pt" fo:font-weight="normal" officeooo:rsid="00b5688b" style:font-size-asian="10pt" style:font-weight-asian="normal" style:font-size-complex="10pt" style:font-weight-complex="normal"/>
    </style:style>
    <style:style style:name="T126" style:family="text">
      <style:text-properties style:font-name="Times New Roman" fo:font-size="10pt" fo:font-weight="normal" officeooo:rsid="00bd87be" style:font-size-asian="10pt" style:font-weight-asian="normal" style:font-size-complex="10pt" style:font-weight-complex="normal"/>
    </style:style>
    <style:style style:name="T127" style:family="text">
      <style:text-properties style:font-name="Times New Roman" fo:font-size="10pt" fo:font-weight="normal" officeooo:rsid="00bd2090" style:font-size-asian="10pt" style:font-weight-asian="normal" style:font-size-complex="10pt" style:font-weight-complex="normal"/>
    </style:style>
    <style:style style:name="T128" style:family="text">
      <style:text-properties style:font-name="Times New Roman" fo:font-size="10pt" fo:font-weight="normal" officeooo:rsid="00c076ad" style:font-size-asian="10pt" style:font-weight-asian="normal" style:font-size-complex="10pt" style:font-weight-complex="normal"/>
    </style:style>
    <style:style style:name="T129" style:family="text">
      <style:text-properties style:font-name="Times New Roman" fo:font-size="10pt" fo:font-weight="normal" officeooo:rsid="00c0cfa6" style:font-size-asian="10pt" style:font-weight-asian="normal" style:font-size-complex="10pt" style:font-weight-complex="normal"/>
    </style:style>
    <style:style style:name="T130" style:family="text">
      <style:text-properties style:font-name="Times New Roman" fo:font-size="10pt" fo:font-weight="normal" officeooo:rsid="00c69a55" style:font-size-asian="10pt" style:font-weight-asian="normal" style:font-size-complex="10pt" style:font-weight-complex="normal"/>
    </style:style>
    <style:style style:name="T131" style:family="text">
      <style:text-properties style:font-name="Times New Roman" fo:font-size="10pt" fo:font-weight="normal" officeooo:rsid="00cce034" style:font-size-asian="10pt" style:font-weight-asian="normal" style:font-size-complex="10pt" style:font-weight-complex="normal"/>
    </style:style>
    <style:style style:name="T132" style:family="text">
      <style:text-properties style:font-name="Times New Roman" fo:font-size="10pt" fo:font-weight="normal" officeooo:rsid="00b1633c" style:font-size-asian="10pt" style:font-weight-asian="normal" style:font-size-complex="10pt" style:font-weight-complex="normal"/>
    </style:style>
    <style:style style:name="T133" style:family="text">
      <style:text-properties style:font-name="Times New Roman" fo:font-size="10pt" fo:font-weight="normal" officeooo:rsid="01486b41" style:font-size-asian="10pt" style:font-weight-asian="normal" style:font-size-complex="10pt" style:font-weight-complex="normal"/>
    </style:style>
    <style:style style:name="T134" style:family="text">
      <style:text-properties style:font-name="Times New Roman" fo:font-size="10pt" fo:font-weight="normal" officeooo:rsid="00e5d1d3" style:font-size-asian="10pt" style:font-weight-asian="normal" style:font-size-complex="10pt" style:font-weight-complex="normal"/>
    </style:style>
    <style:style style:name="T135" style:family="text">
      <style:text-properties style:font-name="Times New Roman" fo:font-size="10pt" fo:font-weight="normal" officeooo:rsid="00e74568" style:font-size-asian="10pt" style:font-weight-asian="normal" style:font-size-complex="10pt" style:font-weight-complex="normal"/>
    </style:style>
    <style:style style:name="T136" style:family="text">
      <style:text-properties style:font-name="Times New Roman" fo:font-size="10pt" fo:font-weight="normal" officeooo:rsid="0165c8c6" style:font-size-asian="10pt" style:font-weight-asian="normal" style:font-size-complex="10pt" style:font-weight-complex="normal"/>
    </style:style>
    <style:style style:name="T137" style:family="text">
      <style:text-properties style:font-name="Times New Roman" fo:font-size="10pt" style:font-size-asian="10pt" style:font-size-complex="10pt"/>
    </style:style>
    <style:style style:name="T138" style:family="text">
      <style:text-properties style:font-name="Times New Roman" fo:font-size="10pt" officeooo:rsid="010c0edc" style:font-size-asian="10pt" style:font-size-complex="10pt"/>
    </style:style>
    <style:style style:name="T139" style:family="text">
      <style:text-properties style:font-name="Times New Roman" fo:font-size="10pt" officeooo:rsid="01112388" style:font-size-asian="10pt" style:font-size-complex="10pt"/>
    </style:style>
    <style:style style:name="T140" style:family="text">
      <style:text-properties style:font-name="Times New Roman" fo:font-size="10pt" officeooo:rsid="0112aec4" style:font-size-asian="10pt" style:font-size-complex="10pt"/>
    </style:style>
    <style:style style:name="T141" style:family="text">
      <style:text-properties style:font-name="Times New Roman" fo:font-size="10pt" officeooo:rsid="01042a39" style:font-size-asian="10pt" style:font-size-complex="10pt"/>
    </style:style>
    <style:style style:name="T142" style:family="text">
      <style:text-properties style:font-name="Times New Roman" fo:font-size="10pt" officeooo:rsid="00f59dfe" style:font-size-asian="10pt" style:font-size-complex="10pt"/>
    </style:style>
    <style:style style:name="T143" style:family="text">
      <style:text-properties style:font-name="Times New Roman" fo:font-size="10pt" officeooo:rsid="0118531c" style:font-size-asian="10pt" style:font-size-complex="10pt"/>
    </style:style>
    <style:style style:name="T14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5" style:family="text">
      <style:text-properties style:font-name="Times New Roman" fo:font-size="10pt" fo:font-weight="bold" officeooo:rsid="0084471c" style:font-size-asian="10pt" style:font-weight-asian="bold" style:font-size-complex="10pt" style:font-weight-complex="bold"/>
    </style:style>
    <style:style style:name="T146" style:family="text">
      <style:text-properties style:font-name="Times New Roman" fo:font-size="10pt" fo:font-weight="bold" officeooo:rsid="00a34c0d" style:font-size-asian="10pt" style:font-weight-asian="bold" style:font-size-complex="10pt" style:font-weight-complex="bold"/>
    </style:style>
    <style:style style:name="T147" style:family="text">
      <style:text-properties style:font-name="Times New Roman" fo:font-size="10pt" fo:font-weight="bold" officeooo:rsid="008f581c" style:font-size-asian="10pt" style:font-weight-asian="bold" style:font-size-complex="10pt" style:font-weight-complex="bold"/>
    </style:style>
    <style:style style:name="T148" style:family="text">
      <style:text-properties style:font-name="Times New Roman" fo:font-size="10pt" fo:font-weight="bold" officeooo:rsid="00ea36b1" style:font-size-asian="10pt" style:font-weight-asian="bold" style:font-size-complex="10pt" style:font-weight-complex="bold"/>
    </style:style>
    <style:style style:name="T149" style:family="text">
      <style:text-properties style:font-name="Times New Roman" fo:font-size="10pt" fo:font-weight="bold" officeooo:rsid="00ec1241" style:font-size-asian="10pt" style:font-weight-asian="bold" style:font-size-complex="10pt" style:font-weight-complex="bold"/>
    </style:style>
    <style:style style:name="T150" style:family="text">
      <style:text-properties style:font-name="Times New Roman" fo:font-size="10pt" fo:font-weight="bold" officeooo:rsid="00a8b448" style:font-size-asian="10pt" style:font-weight-asian="bold" style:font-size-complex="10pt" style:font-weight-complex="bold"/>
    </style:style>
    <style:style style:name="T151" style:family="text">
      <style:text-properties style:font-name="Times New Roman" fo:font-size="10pt" fo:font-weight="bold" officeooo:rsid="00b94d32" style:font-size-asian="10pt" style:font-weight-asian="bold" style:font-size-complex="10pt" style:font-weight-complex="bold"/>
    </style:style>
    <style:style style:name="T152" style:family="text">
      <style:text-properties style:font-name="Times New Roman" fo:font-size="10pt" fo:font-weight="bold" officeooo:rsid="00846a45" style:font-size-asian="10pt" style:font-weight-asian="bold" style:font-size-complex="10pt" style:font-weight-complex="bold"/>
    </style:style>
    <style:style style:name="T153" style:family="text">
      <style:text-properties style:font-name="Times New Roman" fo:font-size="10pt" fo:font-weight="bold" officeooo:rsid="00b98f7a" style:font-size-asian="10pt" style:font-weight-asian="bold" style:font-size-complex="10pt" style:font-weight-complex="bold"/>
    </style:style>
    <style:style style:name="T154" style:family="text">
      <style:text-properties style:font-name="Times New Roman" fo:font-size="10pt" fo:font-weight="bold" officeooo:rsid="00f59dfe" style:font-size-asian="10pt" style:font-weight-asian="bold" style:font-size-complex="10pt" style:font-weight-complex="bold"/>
    </style:style>
    <style:style style:name="T155" style:family="text">
      <style:text-properties style:font-name="Times New Roman" fo:font-size="10pt" fo:font-weight="bold" officeooo:rsid="01042a39" style:font-size-asian="10pt" style:font-weight-asian="bold" style:font-size-complex="10pt" style:font-weight-complex="bold"/>
    </style:style>
    <style:style style:name="T156" style:family="text">
      <style:text-properties style:font-name="Times New Roman" fo:font-size="10pt" fo:font-weight="bold" officeooo:rsid="00919dcc" style:font-size-asian="10pt" style:font-weight-asian="bold" style:font-size-complex="10pt" style:font-weight-complex="bold"/>
    </style:style>
    <style:style style:name="T157" style:family="text">
      <style:text-properties style:font-name="Times New Roman" fo:font-size="10pt" fo:font-style="normal" fo:font-weight="normal" officeooo:rsid="00846a45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style:font-name="Times New Roman" fo:font-size="10pt" fo:font-style="normal" fo:font-weight="normal" officeooo:rsid="00866502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style:font-name="Times New Roman" fo:font-size="10pt" fo:font-style="normal" fo:font-weight="normal" officeooo:rsid="008ab34b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style:font-name="Times New Roman" fo:font-size="10pt" fo:font-style="normal" fo:font-weight="normal" officeooo:rsid="008bbb65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style:font-name="Times New Roman" fo:font-size="10pt" fo:font-style="normal" fo:font-weight="normal" officeooo:rsid="00d20212" style:font-size-asian="10pt" style:font-style-asian="normal" style:font-weight-asian="normal" style:font-size-complex="10pt" style:font-style-complex="normal" style:font-weight-complex="normal"/>
    </style:style>
    <style:style style:name="T162" style:family="text">
      <style:text-properties style:font-name="Times New Roman" fo:font-size="10pt" fo:font-style="normal" fo:font-weight="normal" officeooo:rsid="00c61aee" style:font-size-asian="10pt" style:font-style-asian="normal" style:font-weight-asian="normal" style:font-size-complex="10pt" style:font-style-complex="normal" style:font-weight-complex="normal"/>
    </style:style>
    <style:style style:name="T163" style:family="text">
      <style:text-properties style:font-name="Times New Roman" fo:font-size="10pt" fo:font-style="normal" fo:font-weight="normal" officeooo:rsid="0084471c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style:font-name="Times New Roman" fo:font-size="10pt" fo:font-style="italic" fo:font-weight="normal" officeooo:rsid="00d20212" style:font-size-asian="10pt" style:font-style-asian="italic" style:font-weight-asian="normal" style:font-size-complex="10pt" style:font-style-complex="italic" style:font-weight-complex="normal"/>
    </style:style>
    <style:style style:name="T165" style:family="text">
      <style:text-properties style:font-name="Times New Roman" fo:font-size="10pt" fo:font-style="italic" fo:font-weight="normal" officeooo:rsid="00f78f92" style:font-size-asian="10pt" style:font-style-asian="italic" style:font-weight-asian="normal" style:font-size-complex="10pt" style:font-style-complex="italic" style:font-weight-complex="normal"/>
    </style:style>
    <style:style style:name="T166" style:family="text">
      <style:text-properties style:font-name="Times New Roman" fo:font-size="10pt" fo:font-style="italic" fo:font-weight="normal" officeooo:rsid="00e23593" style:font-size-asian="10pt" style:font-style-asian="italic" style:font-weight-asian="normal" style:font-size-complex="10pt" style:font-style-complex="italic" style:font-weight-complex="normal"/>
    </style:style>
    <style:style style:name="T167" style:family="text">
      <style:text-properties style:font-name="Times New Roman" fo:font-size="10pt" fo:font-style="italic" fo:font-weight="bold" officeooo:rsid="010c0edc" style:font-size-asian="10pt" style:font-style-asian="italic" style:font-weight-asian="bold" style:font-size-complex="10pt" style:font-style-complex="italic" style:font-weight-complex="bold"/>
    </style:style>
    <style:style style:name="T168" style:family="text">
      <style:text-properties style:font-name="Times New Roman" fo:font-weight="normal" style:font-weight-asian="normal" style:font-weight-complex="normal"/>
    </style:style>
    <style:style style:name="T169" style:family="text">
      <style:text-properties style:font-name="Times New Roman" fo:font-weight="normal" officeooo:rsid="010c0edc" style:font-weight-asian="normal" style:font-weight-complex="normal"/>
    </style:style>
    <style:style style:name="T170" style:family="text">
      <style:text-properties style:font-name="Times New Roman" fo:font-weight="normal" officeooo:rsid="0110aa70" style:font-weight-asian="normal" style:font-weight-complex="normal"/>
    </style:style>
    <style:style style:name="T171" style:family="text">
      <style:text-properties style:font-name="Times New Roman" fo:font-weight="normal" officeooo:rsid="00e23593" style:font-weight-asian="normal" style:font-weight-complex="normal"/>
    </style:style>
    <style:style style:name="T172" style:family="text">
      <style:text-properties style:font-name="Times New Roman" fo:font-weight="normal" officeooo:rsid="007c7957" style:font-weight-asian="normal" style:font-weight-complex="normal"/>
    </style:style>
    <style:style style:name="T173" style:family="text">
      <style:text-properties style:font-name="Times New Roman" fo:font-weight="normal" officeooo:rsid="007f7ebf" style:font-weight-asian="normal" style:font-weight-complex="normal"/>
    </style:style>
    <style:style style:name="T174" style:family="text">
      <style:text-properties style:font-name="Times New Roman" fo:font-weight="normal" officeooo:rsid="008161d3" style:font-weight-asian="normal" style:font-weight-complex="normal"/>
    </style:style>
    <style:style style:name="T175" style:family="text">
      <style:text-properties style:font-name="Times New Roman" fo:font-weight="normal" officeooo:rsid="00919dcc" style:font-weight-asian="normal" style:font-weight-complex="normal"/>
    </style:style>
    <style:style style:name="T176" style:family="text">
      <style:text-properties style:font-name="Times New Roman" fo:font-weight="normal" officeooo:rsid="0114d9e6" style:font-weight-asian="normal" style:font-weight-complex="normal"/>
    </style:style>
    <style:style style:name="T177" style:family="text">
      <style:text-properties style:font-name="Times New Roman" fo:font-weight="normal" officeooo:rsid="011757a3" style:font-weight-asian="normal" style:font-weight-complex="normal"/>
    </style:style>
    <style:style style:name="T178" style:family="text">
      <style:text-properties style:font-name="Times New Roman" fo:font-weight="normal" officeooo:rsid="00f59dfe" style:font-weight-asian="normal" style:font-weight-complex="normal"/>
    </style:style>
    <style:style style:name="T179" style:family="text">
      <style:text-properties style:font-name="Times New Roman" fo:font-weight="normal" officeooo:rsid="012c3d8e" style:font-weight-asian="normal" style:font-weight-complex="normal"/>
    </style:style>
    <style:style style:name="T180" style:family="text">
      <style:text-properties style:font-name="Times New Roman" fo:font-weight="normal" officeooo:rsid="0082c3a4" style:font-weight-asian="normal" style:font-weight-complex="normal"/>
    </style:style>
    <style:style style:name="T181" style:family="text">
      <style:text-properties style:font-name="Times New Roman" fo:font-weight="normal" officeooo:rsid="01486b41" style:font-weight-asian="normal" style:font-weight-complex="normal"/>
    </style:style>
    <style:style style:name="T182" style:family="text">
      <style:text-properties style:font-name="Times New Roman" officeooo:rsid="00451ecb"/>
    </style:style>
    <style:style style:name="T183" style:family="text">
      <style:text-properties style:font-name="Times New Roman" officeooo:rsid="004541af"/>
    </style:style>
    <style:style style:name="T18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85" style:family="text">
      <style:text-properties style:font-name="Times New Roman" fo:font-style="normal" fo:font-weight="normal" officeooo:rsid="00d00ffa" style:font-style-asian="normal" style:font-weight-asian="normal" style:font-style-complex="normal" style:font-weight-complex="normal"/>
    </style:style>
    <style:style style:name="T186" style:family="text">
      <style:text-properties style:font-name="Times New Roman" fo:font-style="normal" fo:font-weight="normal" officeooo:rsid="012945b4" style:font-style-asian="normal" style:font-weight-asian="normal" style:font-style-complex="normal" style:font-weight-complex="normal"/>
    </style:style>
    <style:style style:name="T187" style:family="text">
      <style:text-properties style:font-name="Times New Roman" fo:font-style="normal" fo:font-weight="normal" officeooo:rsid="012f701b" style:font-style-asian="normal" style:font-weight-asian="normal" style:font-style-complex="normal" style:font-weight-complex="normal"/>
    </style:style>
    <style:style style:name="T188" style:family="text">
      <style:text-properties style:font-name="Times New Roman" fo:font-style="normal" fo:font-weight="normal" officeooo:rsid="0133b3b9" style:font-style-asian="normal" style:font-weight-asian="normal" style:font-style-complex="normal" style:font-weight-complex="normal"/>
    </style:style>
    <style:style style:name="T189" style:family="text">
      <style:text-properties style:font-name="Times New Roman" fo:font-weight="bold" style:font-weight-asian="bold" style:font-weight-complex="bold"/>
    </style:style>
    <style:style style:name="T190" style:family="text">
      <style:text-properties style:font-name="Times New Roman" fo:font-weight="bold" officeooo:rsid="009cb907" style:font-weight-asian="bold" style:font-weight-complex="bold"/>
    </style:style>
    <style:style style:name="T191" style:family="text">
      <style:text-properties style:font-name="Times New Roman" fo:font-weight="bold" officeooo:rsid="00a34c0d" style:font-weight-asian="bold" style:font-weight-complex="bold"/>
    </style:style>
    <style:style style:name="T192" style:family="text">
      <style:text-properties style:font-name="Times New Roman" fo:font-weight="bold" officeooo:rsid="011757a3" style:font-weight-asian="bold" style:font-weight-complex="bold"/>
    </style:style>
    <style:style style:name="T193" style:family="text">
      <style:text-properties style:font-name="Times New Roman" fo:font-weight="bold" officeooo:rsid="0082c3a4" style:font-weight-asian="bold" style:font-weight-complex="bold"/>
    </style:style>
    <style:style style:name="T194" style:family="text">
      <style:text-properties style:font-name="Times New Roman" officeooo:rsid="00919dcc"/>
    </style:style>
    <style:style style:name="T195" style:family="text">
      <style:text-properties style:font-name="Times New Roman" officeooo:rsid="01027bff"/>
    </style:style>
    <style:style style:name="T196" style:family="text">
      <style:text-properties style:font-name="Times New Roman" officeooo:rsid="01042a39"/>
    </style:style>
    <style:style style:name="T197" style:family="text">
      <style:text-properties style:font-name="Times New Roman" officeooo:rsid="01112388"/>
    </style:style>
    <style:style style:name="T198" style:family="text">
      <style:text-properties style:font-name="Times New Roman" officeooo:rsid="0118531c"/>
    </style:style>
    <style:style style:name="T199" style:family="text">
      <style:text-properties style:font-name="Times New Roman" officeooo:rsid="012945b4"/>
    </style:style>
    <style:style style:name="T200" style:family="text">
      <style:text-properties style:font-name="Times New Roman" fo:font-size="12pt" fo:font-style="normal" fo:font-weight="normal" officeooo:rsid="0158ff02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officeooo:rsid="010f679a"/>
    </style:style>
    <style:style style:name="T202" style:family="text">
      <style:text-properties officeooo:rsid="00910135"/>
    </style:style>
    <style:style style:name="T203" style:family="text">
      <style:text-properties officeooo:rsid="00912a2f"/>
    </style:style>
    <style:style style:name="T204" style:family="text">
      <style:text-properties officeooo:rsid="00995d50"/>
    </style:style>
    <style:style style:name="T205" style:family="text">
      <style:text-properties officeooo:rsid="00919dcc"/>
    </style:style>
    <style:style style:name="T206" style:family="text">
      <style:text-properties officeooo:rsid="009ad7af"/>
    </style:style>
    <style:style style:name="T207" style:family="text">
      <style:text-properties officeooo:rsid="00b43fb9"/>
    </style:style>
    <style:style style:name="T208" style:family="text">
      <style:text-properties officeooo:rsid="0118531c"/>
    </style:style>
    <style:style style:name="T209" style:family="text">
      <style:text-properties officeooo:rsid="012e251d"/>
    </style:style>
    <style:style style:name="T210" style:family="text">
      <style:text-properties fo:font-size="12pt" fo:font-weight="normal" officeooo:rsid="00e5d1d3" style:font-size-asian="12pt" style:font-weight-asian="normal" style:font-size-complex="12pt" style:font-weight-complex="normal"/>
    </style:style>
    <style:style style:name="T211" style:family="text">
      <style:text-properties fo:font-size="12pt" fo:font-weight="normal" officeooo:rsid="01560de9" style:font-size-asian="12pt" style:font-weight-asian="normal" style:font-size-complex="12pt" style:font-weight-complex="normal"/>
    </style:style>
    <style:style style:name="T212" style:family="text">
      <style:text-properties fo:font-size="12pt" fo:font-weight="normal" officeooo:rsid="0156e2e3" style:font-size-asian="12pt" style:font-weight-asian="normal" style:font-size-complex="12pt" style:font-weight-complex="normal"/>
    </style:style>
    <style:style style:name="T213" style:family="text">
      <style:text-properties fo:font-size="12pt" fo:font-style="normal" fo:font-weight="normal" officeooo:rsid="012f701b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157f693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158ff02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15ac21f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1631db8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16390a0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1650c84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1655f3d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bold" officeooo:rsid="015e486c" style:font-size-asian="12pt" style:font-style-asian="normal" style:font-weight-asian="bold" style:font-size-complex="12pt" style:font-style-complex="normal" style:font-weight-complex="bold"/>
    </style:style>
    <style:style style:name="T222" style:family="text">
      <style:text-properties fo:font-size="12pt" fo:font-style="normal" fo:font-weight="bold" officeooo:rsid="01655f3d" style:font-size-asian="12pt" style:font-style-asian="normal" style:font-weight-asian="bold" style:font-size-complex="12pt" style:font-style-complex="normal" style:font-weight-complex="bold"/>
    </style:style>
    <style:style style:name="T223" style:family="text">
      <style:text-properties fo:font-size="12pt" fo:font-style="normal" fo:font-weight="bold" officeooo:rsid="0165c8c6" style:font-size-asian="12pt" style:font-style-asian="normal" style:font-weight-asian="bold" style:font-size-complex="12pt" style:font-style-complex="normal" style:font-weight-complex="bold"/>
    </style:style>
    <style:style style:name="T224" style:family="text">
      <style:text-properties fo:font-size="12pt" fo:font-weight="bold" officeooo:rsid="01560de9" style:font-size-asian="12pt" style:font-weight-asian="bold" style:font-size-complex="12pt" style:font-weight-complex="bold"/>
    </style:style>
    <style:style style:name="T225" style:family="text">
      <style:text-properties fo:font-size="12pt" fo:font-weight="bold" officeooo:rsid="01601784" style:font-size-asian="12pt" style:font-weight-asian="bold" style:font-size-complex="12pt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Zabbix</text:p>
      <text:h text:style-name="P118" text:outline-level="1"><text:span text:style-name="T4">1. </text:span>Overview</text:h>
      <text:p text:style-name="P24">- A zabbix-based monitoring system.</text:p>
      <text:p text:style-name="P24">- Production and non-disruptive, therefore read-only</text:p>
      <text:p text:style-name="P24">- <text:span text:style-name="T2">Practical experience with automated deployment, infrastructure monitoring, high availability and operational decision making</text:span></text:p>
      <text:h text:style-name="P118" text:outline-level="1"><text:span text:style-name="T4">2. </text:span>Requirements </text:h>
      <text:h text:style-name="P121" text:outline-level="2"><text:span text:style-name="T4">2.1 </text:span>Design and Deployment of Zabbix</text:h>
      <text:p text:style-name="P25">- <text:span text:style-name="T4">Must be installed in a high-availability configuration, using at least two redundant nodes. This refers to monitoring system and its supporting services.</text:span></text:p>
      <text:p text:style-name="P24">- <text:span text:style-name="T4">Consider which components are stateful, which can be replicated, and how failures are detected and handled.</text:span></text:p>
      <text:p text:style-name="P26"><text:span text:style-name="T1">- </text:span><text:span text:style-name="T4">The system must remain operational when at least one monitoring node becomes unavailable.</text:span></text:p>
      <text:h text:style-name="P121" text:outline-level="2">2.2 Deployment and configuration using Ansible </text:h>
      <text:p text:style-name="P24">- <text:span text:style-name="T5">All deployment and configuration must be automated using Ansible.<text:line-break/>- Zabbix servers and supporting services, and definition of monitored systems <text:line-break/>- Ansible inventory should represent both monitoring infrastructure and the systems being monitored.</text:span></text:p>
      <text:p text:style-name="P27">- Expectations are, that adding or removing a monitored system is handled through inventory changes and re-running the playbooks (No manual changesin the Zabbix user interface.). </text:p>
      <text:p text:style-name="P27">- <text:span text:style-name="T6">Automation must be idempotent and reproducible, allowing the entire monitoring system to be rebuilt from scratch. </text:span></text:p>
      <text:p text:style-name="P24"/>
      <text:p text:style-name="P28"/>
      <text:h text:style-name="P119" text:outline-level="1">3. Configurations</text:h>
      <text:p text:style-name="P29"><text:span text:style-name="T7">3.1 </text:span>SSH Configuration </text:p>
      <text:p text:style-name="P33"><text:span text:style-name="T3">PRIMA-KEY<text:line-break/></text:span><text:span text:style-name="T1">chmod 600 PRIMA-KEY-PRIVATE.pem<text:line-break/></text:span>ssh-keygen -y -f PRIMA-KEY-PRIVATE.pem &gt; PRIMA-KEY-PUBLIC.pub<text:line-break/>cat PRIMA-KEY-PUBLIC.pub</text:p>
      <text:p text:style-name="P33"><text:span text:style-name="T34">Connect with assigned Floating IP : </text:span>ssh -i PRIMA-KEY-PRIVATE.pem ubuntu@194.47.155.153</text:p>
      <text:p text:style-name="P30">3.2 OpenStack configurations</text:p>
      <text:p text:style-name="P34">Network: PRIMA-NET<text:line-break/>Subnet: PRIMA-SUB, <text:span text:style-name="T10">10.0.1.0/27, IPv4, Enable DHCP, DNS Name Servers 8.8.8.8<text:line-break/>R</text:span><text:span text:style-name="T8">outer: PRIMA-ROUTER, </text:span><text:span text:style-name="T12">External </text:span><text:span text:style-name="T13">(In its interface, add the subnet above)<text:line-break/></text:span><text:span text:style-name="T14">Security Group: Prima-SG, Ingress TCP port 22</text:span></text:p>
      <text:p text:style-name="P36">Instances: </text:p>
      <text:p text:style-name="P35"><text:span text:style-name="T19">Zabbix-One:</text:span><text:span text:style-name="T9"><text:line-break/></text:span><text:span text:style-name="T19">Zabbix</text:span><text:span text:style-name="T9">–</text:span><text:span text:style-name="T44">D</text:span><text:span text:style-name="T9">b–</text:span><text:span text:style-name="T43">One</text:span><text:span text:style-name="T9"> : <text:line-break/></text:span><text:span text:style-name="T43">Zabbi-Backup:</text:span><text:span text:style-name="T9"><text:line-break/>Ansible-</text:span><text:span text:style-name="T42">Center</text:span><text:span text:style-name="T9">: </text:span></text:p>
      <text:p text:style-name="P35"><text:span text:style-name="T19">Floating IP (Zabbix Servers):<text:tab/><text:tab/></text:span>194.47.155.153 </text:p>
      <text:h text:style-name="P121" text:outline-level="2">3.3 Zabbix Configuration</text:h>
      <text:p text:style-name="P22">10050 – Zabbix Agent<text:line-break/>10051 – Zabbix Server</text:p>
      <text:p text:style-name="P23">80 &amp; 443 – <text:span text:style-name="T18">Web<text:line-break/>5432 - PostgreSQL</text:span></text:p>
      <text:p text:style-name="P22"/>
      <text:h text:style-name="P122" text:outline-level="2">3.3.1 Ansible Center</text:h>
      <text:h text:style-name="P57" text:outline-level="2">The Ansible Center server, <text:span text:style-name="T46">an Ubuntu 24.04 server, </text:span><text:span text:style-name="T48">acts as the machine where ansible will be running its plays.</text:span> <text:span text:style-name="T49">It </text:span>was updated and upgraded, and tools such as python3, python3-pip, git and ansible was installed <text:span text:style-name="T47">as start</text:span>. <text:s/><text:span text:style-name="T50">This is also a good server to begin with, as this one needs to be able to talk to the other nodes constantly. </text:span><text:span text:style-name="T51">The Ansible center server will also be used as a jump server, for easy access from local host.</text:span></text:h>
      <text:h text:style-name="P58" text:outline-level="2"><text:span text:style-name="T45">3.3.1.</text:span><text:span text:style-name="T73">1</text:span><text:span text:style-name="T53"> </text:span><text:span text:style-name="T52">Local Machine: </text:span></text:h>
      <text:h text:style-name="P94" text:outline-level="2"><text:span text:style-name="T182"><text:tab/>ssh-add PRIMA-KEY-PRIVATE.pem<text:line-break/><text:tab/></text:span><text:span text:style-name="T110">ssh -A </text:span><text:a xlink:type="simple" xlink:href="mailto:ubuntu@FLOATING_IP" text:style-name="Internet_20_link" text:visited-style-name="Visited_20_Internet_20_Link"><text:span text:style-name="T110">ubuntu@FLOATING_IP</text:span></text:a></text:h>
      <text:h text:style-name="P64" text:outline-level="2"><text:span text:style-name="T22">3</text:span><text:span text:style-name="T21">.</text:span><text:span text:style-name="T22">3.1.2</text:span><text:span text:style-name="T21"> Ansible Center</text:span></text:h>
      <text:h text:style-name="P95" text:outline-level="2"><text:span text:style-name="T183"><text:tab/></text:span><text:span text:style-name="T110">ssh-add -L<text:line-break/><text:tab/>ssh </text:span><text:a xlink:type="simple" xlink:href="mailto:ubuntu@10.0.1.10" text:style-name="Internet_20_link" text:visited-style-name="Visited_20_Internet_20_Link"><text:span text:style-name="T110">ubuntu@10.0.1.10</text:span></text:a><text:span text:style-name="T110"><text:tab/></text:span><text:span text:style-name="T183">(Zabbix One)</text:span></text:h>
      <text:h text:style-name="P65" text:outline-level="2"/>
      <text:h text:style-name="P59" text:outline-level="2"><text:soft-page-break/><text:span text:style-name="T73">3</text:span><text:span text:style-name="T53">.</text:span><text:span text:style-name="T73">3.1.3</text:span>. <text:span text:style-name="T67">Admin </text:span>SSH <text:span text:style-name="T68">C</text:span>onfig<text:span text:style-name="T70">uration (Local Machine)</text:span></text:h>
      <text:h text:style-name="P68" text:outline-level="2">I put my private key in ~/.ssh/ for easy access. <text:span text:style-name="T54">Then the ssh config</text:span><text:span text:style-name="T69">uration</text:span><text:span text:style-name="T54"> file can be edited by using the command : </text:span><text:span text:style-name="T33">vim ~/.ssh/config </text:span><text:span text:style-name="T55">and this can be </text:span><text:span text:style-name="T56">written: </text:span></text:h>
      <text:h text:style-name="P71" text:outline-level="2">Host ansible-center<text:line-break/><text:tab/>HostName 194.47.155.153<text:line-break/><text:tab/>User ubuntu<text:line-break/><text:tab/>IdentityFile ~/.ssh/PRIMA-KEY-PRIVATE.pem</text:h>
      <text:h text:style-name="P72" text:outline-level="2">Host zabbix-one<text:line-break/><text:tab/>HostName 10.0.1.10<text:line-break/><text:tab/>User ubuntu<text:line-break/><text:tab/>ProxyJump ansible-center<text:line-break/><text:tab/>IdentityFile ~/.ssh/PRIMA-KEY-PRIVATE.pem</text:h>
      <text:h text:style-name="P72" text:outline-level="2">Host zabbix-db-one<text:line-break/><text:tab/>HostName 10.0.1.2<text:span text:style-name="T75">2</text:span><text:line-break/><text:tab/>User ubuntu<text:line-break/><text:tab/>ProxyJump ansible-center<text:line-break/><text:tab/>IdentityFile ~/.ssh/PRIMA-KEY-PRIVATE.pem</text:h>
      <text:h text:style-name="P73" text:outline-level="2">Host zabbix-<text:span text:style-name="T76">backup</text:span><text:line-break/><text:tab/>HostName 10.0.1.<text:span text:style-name="T77">15</text:span><text:line-break/><text:tab/>User ubuntu<text:line-break/><text:tab/>ProxyJump ansible-center<text:line-break/><text:tab/>IdentityFile ~/.ssh/PRIMA-KEY-PRIVATE.pem</text:h>
      <text:h text:style-name="P59" text:outline-level="2"><text:span text:style-name="T73">3</text:span><text:span text:style-name="T53">.</text:span><text:span text:style-name="T73">3.1.4</text:span> SSH <text:span text:style-name="T68">C</text:span>onfig<text:span text:style-name="T70">uration (</text:span><text:span text:style-name="T71">Ansible/Automation Key</text:span><text:span text:style-name="T70">)</text:span></text:h>
      <text:h text:style-name="P66" text:outline-level="2"><text:span text:style-name="T58">ssh-keygen -t ed25519 -f ~/.ssh/ansible -C "ansible-automation"<text:line-break/><text:tab/>~/.</text:span><text:span text:style-name="T60">ssh/ansible <text:tab/><text:tab/>(Private </text:span><text:span text:style-name="T61">K</text:span><text:span text:style-name="T60">ey)<text:line-break/><text:tab/></text:span><text:span text:style-name="T58">~/.</text:span><text:span text:style-name="T60">ssh/ansible.pub<text:tab/>(Public Key)<text:line-break/></text:span><text:span text:style-name="T63">Get the </text:span><text:span text:style-name="T65">p</text:span><text:span text:style-name="T64">ublic</text:span><text:span text:style-name="T63"> key by: <text:tab/></text:span>cat ~/.ssh/ansible.pub</text:h>
      <text:h text:style-name="P77" text:outline-level="2">ssh-ed25519 AAAAC3NzaC1lZDI1NTE5AAAAICTXgPtoOGVBIx68e1tgF4/bJs8SS28nwKv+t32s3xgT ansible-automation</text:h>
      <text:h text:style-name="P66" text:outline-level="2"><text:span text:style-name="T35">Paste this on the servers </text:span><text:span text:style-name="T36">manually</text:span><text:span text:style-name="T35"> </text:span><text:span text:style-name="T37">(Zabbix-one, Zabbix-db-one </text:span><text:span text:style-name="T38">and etc.</text:span><text:span text:style-name="T37">)</text:span><text:span text:style-name="T35">: </text:span></text:h>
      <text:h text:style-name="P67" text:outline-level="2"><text:span text:style-name="T72">mkdir -p ~/.ssh<text:line-break/></text:span>chmod 700 ~/.ssh<text:line-break/>nano ~/.ssh/authorized_keys<text:line-break/>chmod 600 ~/.ssh/authorized_keys</text:h>
      <text:h text:style-name="P67" text:outline-level="2"><text:span text:style-name="T72">And of course, test from Ansible-center:<text:tab/></text:span>ssh -i ~/.ssh/ansible ubuntu@10.0.1.10</text:h>
      <text:h text:style-name="P78" text:outline-level="2">The <text:s/><text:span text:style-name="T39">vim ~/.ssh/config </text:span><text:span text:style-name="T57">on the ansible-center server can be configured to handle the connections as well, </text:span><text:span text:style-name="T59">but pointing to the created private key instead in the </text:span><text:span text:style-name="T40">IdentityFile</text:span><text:span text:style-name="T59"> variable (~/.ssh/ansible.pem).</text:span></text:h>
      <text:h text:style-name="P74" text:outline-level="2">Host zabbix-one<text:line-break/> <text:s text:c="3"/>HostName 10.0.1.10<text:line-break/> <text:s text:c="3"/>User ubuntu<text:line-break/> <text:s text:c="3"/>IdentityFile ~/.ssh/ansible</text:h>
      <text:h text:style-name="P74" text:outline-level="2">Host zabbix-db-one<text:line-break/> <text:s text:c="3"/>HostName 10.0.1.21<text:line-break/> <text:s text:c="3"/>User ubuntu<text:line-break/> <text:s text:c="3"/>IdentityFile ~/.ssh/ansible</text:h>
      <text:h text:style-name="P79" text:outline-level="2"><text:span text:style-name="T20">3</text:span><text:span text:style-name="T21">.</text:span><text:span text:style-name="T20">3.1.5 Ansible Configuration</text:span></text:h>
      <text:h text:style-name="P80" text:outline-level="2">Create the directories on the ansible_center server: </text:h>
      <text:p text:style-name="P10"/>
      <text:h text:style-name="P84" text:outline-level="2">mkdir -p ~/ansible/{inventory,playbooks,group_vars}<text:line-break/>cd ~/ansible<text:line-break/>nano inventory/hosts.ini</text:h>
      <text:h text:style-name="P82" text:outline-level="2">And fill this file with this content:</text:h>
      <text:h text:style-name="P85" text:outline-level="2">[zabbix]<text:line-break/>zabbix-one ansible_host=10.0.1.10<text:line-break/>zabbix-db-one ansible_host=10.0.1.22<text:line-break/>zabbix-backup ansible_host=10.0.1.15</text:h>
      <text:h text:style-name="P81" text:outline-level="2"><text:span text:style-name="T66">Then do this (</text:span><text:span text:style-name="T41">nano group_vars/all.yml) a</text:span><text:span text:style-name="T74">nd fill this file with this content:</text:span></text:h>
      <text:h text:style-name="P85" text:outline-level="2">ansible_user: ubuntu<text:line-break/>ansible_ssh_private_key_file: ~/.ssh/ansible</text:h>
      <text:p text:style-name="P10"/>
      <text:h text:style-name="P82" text:outline-level="2">This can also be tested with the command: ansible -i inventory/hosts.ini zabbix -m ping</text:h>
      <text:h text:style-name="P83" text:outline-level="2">The result should look like: </text:h>
      <text:h text:style-name="P75" text:outline-level="2">zabbix-backup | SUCCESS =&gt; {<text:line-break/><text:tab/>"ansible_facts": {<text:line-break/><text:tab/>"discovered_interpreter_python": "/usr/bin/python3"<text:line-break/><text:tab/>},<text:line-break/><text:tab/>"changed": false,<text:line-break/><text:tab/>"ping": "pong"</text:h>
      <text:h text:style-name="P75" text:outline-level="2"><text:tab/>}</text:h>
      <text:h text:style-name="P75" text:outline-level="2">zabbix-one | SUCCESS =&gt; {<text:line-break/><text:tab/>"ansible_facts": {<text:line-break/><text:tab/>"discovered_interpreter_python": "/usr/bin/python3"<text:line-break/><text:tab/>},<text:line-break/><text:tab/>"changed": false,<text:line-break/><text:tab/>"ping": "pong"</text:h>
      <text:h text:style-name="P76" text:outline-level="2"><text:tab/>}</text:h>
      <text:h text:style-name="P76" text:outline-level="2">zabbix-db-one | SUCCESS =&gt; {<text:line-break/><text:tab/>"ansible_facts": {<text:line-break/><text:tab/>"discovered_interpreter_python": "/usr/bin/python3"<text:line-break/><text:tab/>},<text:line-break/><text:tab/>"changed": false,<text:line-break/><text:tab/>"ping": "pong"<text:line-break/>}</text:h>
      <text:h text:style-name="P119" text:outline-level="1">4. Installations - <text:span text:style-name="T107">Standalone</text:span></text:h>
      <text:h text:style-name="P86" text:outline-level="2"><text:span text:style-name="T20">4.1 Zabbix 7.0 </text:span><text:span text:style-name="T23">Server</text:span></text:h>
      <text:h text:style-name="P60" text:outline-level="2"><text:span text:style-name="T78">1</text:span><text:span text:style-name="T86">st</text:span> steps – <text:span text:style-name="T93">Inital configuration</text:span></text:h>
      <text:h text:style-name="P115" text:outline-level="2"><text:span text:style-name="Strong_20_Emphasis"><text:span text:style-name="T79">wget </text:span></text:span><text:a xlink:type="simple" xlink:href="https://repo.zabbix.com/zabbix/7.0/ubuntu/pool/main/z/zabbix-release/zabbix-release_7.0-1+ubuntu22.04_all.deb" text:style-name="Internet_20_link" text:visited-style-name="Visited_20_Internet_20_Link"><text:span text:style-name="Strong_20_Emphasis"><text:span text:style-name="T79">https://repo.zabbix.com/zabbix/7.0/ubuntu/pool/main/z/zabbix-release/zabbix-release_7.0-1+ubuntu2</text:span></text:span><text:span text:style-name="Strong_20_Emphasis"><text:span text:style-name="T82">4</text:span></text:span><text:span text:style-name="Strong_20_Emphasis"><text:span text:style-name="T79">.04_all.deb</text:span></text:span></text:a></text:h>
      <text:h text:style-name="P96" text:outline-level="2"><text:span text:style-name="T116">sudo dpkg -i zabbix-release_7.0-1+ubuntu22.04_all.deb<text:line-break/></text:span><text:span text:style-name="T117">sudo </text:span><text:span text:style-name="Strong_20_Emphasis"><text:span text:style-name="T111">apt update</text:span></text:span></text:h>
      <text:h text:style-name="P97" text:outline-level="2"><text:span text:style-name="Strong_20_Emphasis"><text:span text:style-name="T112">[Continue with first steps in 4.2 – </text:span></text:span><text:span text:style-name="Strong_20_Emphasis"><text:span text:style-name="T118">if database is not setup yet</text:span></text:span><text:span text:style-name="Strong_20_Emphasis"><text:span text:style-name="T112">]</text:span></text:span></text:h>
      <text:h text:style-name="P112" text:outline-level="2"><text:span text:style-name="Strong_20_Emphasis"><text:span text:style-name="T144">2</text:span></text:span><text:span text:style-name="Strong_20_Emphasis"><text:span text:style-name="T90">nd</text:span></text:span><text:span text:style-name="Strong_20_Emphasis"><text:span text:style-name="T144"> steps – </text:span></text:span><text:span text:style-name="Strong_20_Emphasis"><text:span text:style-name="T147">MySQL Extensions</text:span></text:span></text:h>
      <text:h text:style-name="P98" text:outline-level="2"><text:span text:style-name="Strong_20_Emphasis"><text:span text:style-name="T157">sudo apt install zabbix-server-mysql zabbix-sql-scripts<text:tab/><text:tab/></text:span></text:span><text:span text:style-name="Strong_20_Emphasis"><text:span text:style-name="T158">(Failed)<text:line-break/>sudo nano /etc/apt/sources.list.d/zabbix.list<text:tab/><text:tab/><text:tab/><text:tab/>(Change ‘</text:span></text:span><text:span text:style-name="Strong_20_Emphasis"><text:span text:style-name="T159">j</text:span></text:span><text:span text:style-name="Strong_20_Emphasis"><text:span text:style-name="T158">ammy’ to ‘</text:span></text:span><text:span text:style-name="Strong_20_Emphasis"><text:span text:style-name="T159">n</text:span></text:span><text:span text:style-name="Strong_20_Emphasis"><text:span text:style-name="T158">oble’ → Ansible step!)<text:line-break/>sudo apt install zabbix-server-mysql zabbix-sql-scripts<text:tab/><text:tab/></text:span></text:span><text:span text:style-name="Strong_20_Emphasis"><text:span text:style-name="T160">(Works!)<text:line-break/></text:span></text:span><text:span text:style-name="Strong_20_Emphasis"><text:span text:style-name="T119">Sudo apt upgrade <text:tab/><text:tab/><text:tab/><text:tab/><text:tab/><text:tab/>(Will probably show a question)</text:span></text:span></text:h>
      <text:h text:style-name="P99" text:outline-level="2"><text:span text:style-name="Strong_20_Emphasis"><text:span text:style-name="T148">Note: Use this link for Ubuntu 24.04 instead – </text:span></text:span><text:span text:style-name="Strong_20_Emphasis"><text:span text:style-name="T149">Skipping the ‘jammy’ or ‘noble’ problems: </text:span></text:span><text:span text:style-name="Strong_20_Emphasis"><text:span text:style-name="T148"><text:s/><text:line-break/></text:span></text:span><text:span text:style-name="Strong_20_Emphasis"><text:span text:style-name="T116">wget </text:span></text:span><text:a xlink:type="simple" xlink:href="https://repo.zabbix.com/zabbix/7.0/ubuntu/pool/main/z/zabbix-release/zabbix-release_7.0-1+ubuntu22.04_all.deb" text:style-name="Internet_20_link" text:visited-style-name="Visited_20_Internet_20_Link"><text:span text:style-name="Strong_20_Emphasis"><text:span text:style-name="T116">https://repo.zabbix.com/zabbix/7.0/ubuntu/pool/main/z/zabbix-release/zabbix-release_7.0-1+ubuntu2</text:span></text:span><text:span text:style-name="Strong_20_Emphasis"><text:span text:style-name="T115">2</text:span></text:span><text:span text:style-name="Strong_20_Emphasis"><text:span text:style-name="T116">.04_all.deb</text:span></text:span></text:a></text:h>
      <text:h text:style-name="P99" text:outline-level="2"><text:span text:style-name="Strong_20_Emphasis"><text:span text:style-name="T112">[Continue with </text:span></text:span><text:span text:style-name="Strong_20_Emphasis"><text:span text:style-name="T120">second</text:span></text:span><text:span text:style-name="Strong_20_Emphasis"><text:span text:style-name="T112"> steps in 4.2]</text:span></text:span></text:h>
      <text:h text:style-name="P113" text:outline-level="2"><text:span text:style-name="Strong_20_Emphasis"><text:span text:style-name="T150">3</text:span></text:span><text:span text:style-name="Strong_20_Emphasis"><text:span text:style-name="T91">rd</text:span></text:span><text:span text:style-name="Strong_20_Emphasis"><text:span text:style-name="T150"> </text:span></text:span><text:span text:style-name="Strong_20_Emphasis"><text:span text:style-name="T144">steps – </text:span></text:span><text:span text:style-name="Strong_20_Emphasis"><text:span text:style-name="T150">MariaDB Test &amp; Configuration</text:span></text:span></text:h>
      <text:h text:style-name="P100" text:outline-level="2"><text:span text:style-name="Strong_20_Emphasis"><text:span text:style-name="T112">sudo apt install mariadb-client -y<text:line-break/>mysql -h 10.0.1.22 -u zabbix -p<text:line-break/>sudo nano /etc/zabbix/zabbix_server.conf</text:span></text:span></text:h>
      <text:h text:style-name="P101" text:outline-level="2"><text:span text:style-name="Strong_20_Emphasis"><text:span text:style-name="T112">DBHost=</text:span></text:span><text:span text:style-name="Strong_20_Emphasis"><text:span text:style-name="T145">10.0.1.22</text:span></text:span><text:span text:style-name="Strong_20_Emphasis"><text:span text:style-name="T112"><text:line-break/>DBName=zabbix<text:line-break/>DBUser=zabbix<text:line-break/>DBPassword= </text:span></text:span><text:span text:style-name="Strong_20_Emphasis"><text:span text:style-name="T146">PrimaStack123!</text:span></text:span></text:h>
      <text:h text:style-name="P102" text:outline-level="2"><text:span text:style-name="Strong_20_Emphasis"><text:span text:style-name="T121">zcat /usr/share/zabbix-sql-scripts/mysql/server.sql.gz | mysql -h 10.0.1.22 -u zabbix -p zabbix<text:line-break/>sudo systemctl restart zabbix-server<text:line-break/>sudo systemctl status zabbix-server<text:line-break/>sudo tail -</text:span></text:span><text:span text:style-name="Strong_20_Emphasis"><text:span text:style-name="T122">f</text:span></text:span><text:span text:style-name="Strong_20_Emphasis"><text:span text:style-name="T121"> /var/log/zabbix/zabbix_server.log</text:span></text:span></text:h>
      <text:h text:style-name="P102" text:outline-level="2"><text:span text:style-name="Strong_20_Emphasis"><text:span text:style-name="T112">[Continue with </text:span></text:span><text:span text:style-name="Strong_20_Emphasis"><text:span text:style-name="T123">third</text:span></text:span><text:span text:style-name="Strong_20_Emphasis"><text:span text:style-name="T112"> steps in </text:span></text:span><text:span text:style-name="Strong_20_Emphasis"><text:span text:style-name="T124">4</text:span></text:span><text:span text:style-name="Strong_20_Emphasis"><text:span text:style-name="T112">.</text:span></text:span><text:span text:style-name="Strong_20_Emphasis"><text:span text:style-name="T125">2</text:span></text:span><text:span text:style-name="Strong_20_Emphasis"><text:span text:style-name="T112">]</text:span></text:span></text:h>
      <text:h text:style-name="P103" text:outline-level="2"><text:span text:style-name="Strong_20_Emphasis"><text:span text:style-name="T151">4</text:span></text:span><text:span text:style-name="Strong_20_Emphasis"><text:span text:style-name="T92">th</text:span></text:span><text:span text:style-name="Strong_20_Emphasis"><text:span text:style-name="T151"> </text:span></text:span><text:span text:style-name="Strong_20_Emphasis"><text:span text:style-name="T152">steps –</text:span></text:span><text:span text:style-name="Strong_20_Emphasis"><text:span text:style-name="T150"> </text:span></text:span><text:span text:style-name="Strong_20_Emphasis"><text:span text:style-name="T153">Zabbix Frontend</text:span></text:span></text:h>
      <text:h text:style-name="P104" text:outline-level="2"><text:span text:style-name="Strong_20_Emphasis"><text:span text:style-name="T126">s</text:span></text:span><text:span text:style-name="Strong_20_Emphasis"><text:span text:style-name="T127">udo </text:span></text:span><text:span text:style-name="Strong_20_Emphasis"><text:span text:style-name="T112">apt install zabbix-frontend-php zabbix-nginx-conf<text:line-break/></text:span></text:span><text:span text:style-name="Strong_20_Emphasis"><text:span text:style-name="T128">sudo nano </text:span></text:span><text:span text:style-name="Strong_20_Emphasis"><text:span text:style-name="T112">/etc/zabbix/nginx.conf<text:tab/><text:tab/><text:tab/><text:tab/></text:span></text:span><text:span text:style-name="Strong_20_Emphasis"><text:span text:style-name="T129">(Ubuntu)</text:span></text:span></text:h>
      <text:h text:style-name="P116" text:outline-level="2"><text:span text:style-name="Strong_20_Emphasis"><text:span text:style-name="T112"># listen 8080;</text:span></text:span></text:h>
      <text:p text:style-name="P11"># server_name example.com;<text:line-break/>fastcgi_pass unix:/run/php/<text:span text:style-name="T95">zabbix</text:span>.sock;</text:p>
      <text:p text:style-name="P10"/>
      <text:p text:style-name="P12">ubuntu@zabbix-one:~$ ls /run/php/<text:line-break/>php-fpm.sock <text:s/>php8.3-fpm.pid <text:s/>php8.3-fpm.sock <text:s/>zabbix.sock<text:line-break/>ubuntu@zabbix-one:~$ systemctl list-units | grep php<text:line-break/>php8.3-fpm.servic<text:span text:style-name="T94">e </text:span>loaded active running <text:s text:c="2"/>The PHP 8.3 FastCGI Process Manager<text:line-break/>phpsessionclean.timer loaded active waiting <text:s text:c="2"/>Clean PHP session files every 30 mins</text:p>
      <text:p text:style-name="P10"/>
      <text:p text:style-name="P1"><text:soft-page-break/><text:span text:style-name="Strong_20_Emphasis"><text:span text:style-name="T112">Listen <text:s text:c="9"/>80;<text:line-break/>server_name <text:s text:c="4"/></text:span></text:span><text:span text:style-name="Strong_20_Emphasis"><text:span text:style-name="T145">10.0.1.10;</text:span></text:span><text:span text:style-name="Strong_20_Emphasis"><text:span text:style-name="T112"><text:tab/><text:tab/></text:span></text:span><text:span text:style-name="Strong_20_Emphasis"><text:span text:style-name="T130">(ANSIBLE STEP TO FIX)<text:line-break/>fastcgi_pass unix:/run/php/</text:span></text:span><text:span text:style-name="Strong_20_Emphasis"><text:span text:style-name="T131">php8.3-fpm.sock</text:span></text:span></text:p>
      <text:p text:style-name="P3"><text:span text:style-name="Strong_20_Emphasis"><text:span text:style-name="T161">sudo rm /etc/nginx/sites-enabled/default</text:span></text:span></text:p>
      <text:p text:style-name="P5"><text:span text:style-name="Strong_20_Emphasis"><text:span text:style-name="T162">sudo </text:span></text:span><text:span text:style-name="Strong_20_Emphasis"><text:span text:style-name="T163">systemctl enable nginx<text:line-break/></text:span></text:span><text:span text:style-name="Strong_20_Emphasis"><text:span text:style-name="T162">sudo </text:span></text:span><text:span text:style-name="Strong_20_Emphasis"><text:span text:style-name="T184">systemctl restart nginx php8.3-fpm<text:tab/></text:span></text:span><text:span text:style-name="Strong_20_Emphasis"><text:span text:style-name="T185">(can be found as shown above)</text:span></text:span></text:p>
      <text:p text:style-name="P5"><text:span text:style-name="Strong_20_Emphasis"><text:span text:style-name="T110">sudo nano /etc/zabbix/web/zabbix.conf.php</text:span></text:span></text:p>
      <text:p text:style-name="P4"><text:span text:style-name="Strong_20_Emphasis"><text:span text:style-name="T96">&lt;?php</text:span></text:span></text:p>
      <text:p text:style-name="P16"><text:span text:style-name="T97">$DB</text:span>[<text:span text:style-name="T99">'TYPE'</text:span>] <text:s text:c="4"/>= <text:span text:style-name="T99">'MYSQL'</text:span>;</text:p>
      <text:p text:style-name="P16"><text:span text:style-name="T97">$DB</text:span>[<text:span text:style-name="T99">'SERVER'</text:span>] <text:s text:c="2"/>= <text:span text:style-name="T99">'10.0.1.22'</text:span>;</text:p>
      <text:p text:style-name="P16"><text:span text:style-name="T97">$DB</text:span>[<text:span text:style-name="T99">'PORT'</text:span>] <text:s text:c="4"/>= <text:span text:style-name="T99">'3306'</text:span>;</text:p>
      <text:p text:style-name="P16"><text:span text:style-name="T97">$DB</text:span>[<text:span text:style-name="T99">'DATABASE'</text:span>] = <text:span text:style-name="T99">'zabbix'</text:span>;</text:p>
      <text:p text:style-name="P16"><text:span text:style-name="T97">$DB</text:span>[<text:span text:style-name="T99">'USER'</text:span>] <text:s text:c="4"/>= <text:span text:style-name="T99">'zabbix'</text:span>;</text:p>
      <text:p text:style-name="P4"><text:span text:style-name="T98">$DB</text:span><text:span text:style-name="T110">[</text:span><text:span text:style-name="T102">'PASSWORD'</text:span><text:span text:style-name="T110">] = </text:span><text:span text:style-name="T102">'</text:span><text:span text:style-name="Strong_20_Emphasis"><text:span text:style-name="T104">PrimaStack123</text:span></text:span><text:span text:style-name="Strong_20_Emphasis"><text:span text:style-name="T103">!</text:span></text:span><text:span text:style-name="T102">'</text:span><text:span text:style-name="T110">;</text:span></text:p>
      <text:p text:style-name="P16"/>
      <text:p text:style-name="P16"><text:span text:style-name="T97">$ZBX_SERVER</text:span> <text:s text:c="5"/>= <text:span text:style-name="T99">'localhost'</text:span>;</text:p>
      <text:p text:style-name="P16"><text:span text:style-name="T97">$ZBX_SERVER_PORT</text:span> = <text:span text:style-name="T99">'10051'</text:span>;</text:p>
      <text:p text:style-name="P16"><text:span text:style-name="T97">$ZBX_SERVER_NAME</text:span> = <text:span text:style-name="T99">'Zabbix'</text:span>;</text:p>
      <text:p text:style-name="P47">?&gt;</text:p>
      <text:p text:style-name="P6"><text:span text:style-name="Strong_20_Emphasis"><text:span text:style-name="T185">sudo systemctl restart zabbix-server<text:line-break/>sudo systemctl restart nginx<text:line-break/>sudo systemctl restart php8.3-fpm</text:span></text:span></text:p>
      <text:p text:style-name="Horizontal_20_Line"><text:span text:style-name="Strong_20_Emphasis"><text:span text:style-name="T110"/></text:span></text:p>
      <text:p text:style-name="P2"><text:span text:style-name="Strong_20_Emphasis"><text:span text:style-name="T164">Test on local machine by open an SSH tunnel to the VM Zabbix-One, like: </text:span></text:span></text:p>
      <text:p text:style-name="P2"><text:span text:style-name="Strong_20_Emphasis"><text:span text:style-name="T164"><text:tab/>ssh -L 8080:10.0.1.10:80 </text:span></text:span><text:a xlink:type="simple" xlink:href="mailto:ubuntu@ansible-center" text:style-name="Internet_20_link" text:visited-style-name="Visited_20_Internet_20_Link"><text:span text:style-name="Strong_20_Emphasis"><text:span text:style-name="T164">ubuntu@ansible-center</text:span></text:span></text:a></text:p>
      <text:p text:style-name="P5"><text:span text:style-name="Strong_20_Emphasis"><text:span text:style-name="T165">Then on a browser on the local machine, test </text:span></text:span><text:a xlink:type="simple" xlink:href="http://localhost:8080/" text:style-name="Internet_20_link" text:visited-style-name="Visited_20_Internet_20_Link"><text:span text:style-name="Strong_20_Emphasis"><text:span text:style-name="T165">http://localhost:8080/</text:span></text:span></text:a></text:p>
      <text:p text:style-name="P7"><text:span text:style-name="Strong_20_Emphasis"><text:span text:style-name="T166">username: Admin<text:line-break/>password: zabbix</text:span></text:span></text:p>
      <text:p text:style-name="Horizontal_20_Line"><text:span text:style-name="Strong_20_Emphasis"><text:span text:style-name="T171"/></text:span></text:p>
      <text:h text:style-name="P63" text:outline-level="2">4.<text:span text:style-name="T84">2</text:span> Zabbix <text:span text:style-name="T84">DB </text:span><text:span text:style-name="T85">(MariaDB)</text:span></text:h>
      <text:h text:style-name="P60" text:outline-level="2"><text:span text:style-name="T78">1</text:span><text:span text:style-name="T86">st</text:span> steps – <text:span text:style-name="T202">Initial Configuration</text:span></text:h>
      <text:h text:style-name="P105" text:outline-level="2"><text:span text:style-name="T172"><text:s/></text:span><text:span text:style-name="Strong_20_Emphasis"><text:span text:style-name="T168">wget </text:span></text:span><text:a xlink:type="simple" xlink:href="https://downloads.mariadb.com/MariaDB/mariadb_repo_setup" text:style-name="Internet_20_link" text:visited-style-name="Visited_20_Internet_20_Link"><text:span text:style-name="Strong_20_Emphasis"><text:span text:style-name="T168">https://downloads.mariadb.com/MariaDB/mariadb_repo_setup</text:span></text:span></text:a><text:span text:style-name="Strong_20_Emphasis"><text:span text:style-name="T168"><text:line-break/>chmod +x mariadb_repo_setup<text:line-break/></text:span></text:span><text:span text:style-name="Strong_20_Emphasis"><text:span text:style-name="T173">sudo </text:span></text:span><text:span text:style-name="Strong_20_Emphasis"><text:span text:style-name="T168">./mariadb_repo_setup<text:line-break/></text:span></text:span><text:span text:style-name="Strong_20_Emphasis"><text:span text:style-name="T174">sudo </text:span></text:span><text:span text:style-name="Strong_20_Emphasis"><text:span text:style-name="T172">apt install mariadb-server<text:line-break/></text:span></text:span><text:span text:style-name="Strong_20_Emphasis"><text:span text:style-name="T174">sudo </text:span></text:span><text:span text:style-name="Strong_20_Emphasis"><text:span text:style-name="T168">systemctl enable mariadb<text:line-break/></text:span></text:span><text:span text:style-name="Strong_20_Emphasis"><text:span text:style-name="T174">sudo </text:span></text:span><text:span text:style-name="Strong_20_Emphasis"><text:span text:style-name="T168">systemctl start mariadb<text:line-break/></text:span></text:span><text:span text:style-name="T172">sudo mariadb-secure-installation</text:span></text:h>
      <text:p text:style-name="P17"><text:span text:style-name="T24">For this assignment, no root passwords were created for the DB.<text:line-break/></text:span><text:span text:style-name="T15">Switch to unix_socket authentication [Y/n] Y<text:line-break/>Change the root password? [Y/n] n<text:line-break/>Remove anonymous users? [Y/n] n<text:line-break/>Disallow root login remotely? [Y/n] n<text:line-break/>Remove test database and access to it? [Y/n] n<text:line-break/>Reload privilege tables now? [Y/n] Y</text:span></text:p>
      <text:h text:style-name="P106" text:outline-level="2"><text:span text:style-name="Strong_20_Emphasis"><text:span text:style-name="T112">[Continue with </text:span></text:span><text:span text:style-name="Strong_20_Emphasis"><text:span text:style-name="T132">second</text:span></text:span><text:span text:style-name="Strong_20_Emphasis"><text:span text:style-name="T112"> steps in </text:span></text:span><text:span text:style-name="Strong_20_Emphasis"><text:span text:style-name="T124">4</text:span></text:span><text:span text:style-name="Strong_20_Emphasis"><text:span text:style-name="T112">.</text:span></text:span><text:span text:style-name="Strong_20_Emphasis"><text:span text:style-name="T124">1</text:span></text:span><text:span text:style-name="Strong_20_Emphasis"><text:span text:style-name="T112">]</text:span></text:span></text:h>
      <text:h text:style-name="P61" text:outline-level="2"><text:span text:style-name="T203">2</text:span><text:span text:style-name="T87">nd</text:span><text:span text:style-name="T203"> </text:span>steps – <text:span text:style-name="T203">Further</text:span><text:span text:style-name="T202"> Configuration </text:span><text:span text:style-name="T204">&amp; Create Database</text:span></text:h>
      <text:h text:style-name="P69" text:outline-level="2"><text:span text:style-name="T202">sudo nano /etc/mysql/mariadb.conf.d/50-server.cnf<text:line-break/><text:tab/></text:span><text:span text:style-name="T205">bind-address = 127.0.0.1 (→ 0.0.0.0)</text:span></text:h>
      <text:h text:style-name="P70" text:outline-level="2"><text:span text:style-name="T205">sudo systemctl restart mariadb<text:line-break/>sudo mysql -u root -p<text:tab/><text:tab/><text:tab/></text:span><text:span text:style-name="T206">(Access Database)</text:span></text:h>
      <text:h text:style-name="P107" text:outline-level="2"><text:span text:style-name="Strong_20_Emphasis"><text:span text:style-name="T175">create database zabbix character set utf8mb4 collate utf8mb4_bin;<text:line-break/></text:span></text:span><text:span text:style-name="Strong_20_Emphasis"><text:span text:style-name="T168">create user ‘</text:span></text:span><text:span text:style-name="Strong_20_Emphasis"><text:span text:style-name="T189">zabbix</text:span></text:span><text:span text:style-name="Strong_20_Emphasis"><text:span text:style-name="T168">’@’</text:span></text:span><text:span text:style-name="Strong_20_Emphasis"><text:span text:style-name="T190">10.0.1.10’</text:span></text:span><text:span text:style-name="Strong_20_Emphasis"><text:span text:style-name="T168"> identified by '</text:span></text:span><text:span text:style-name="Strong_20_Emphasis"><text:span text:style-name="T191">PrimaStack123!</text:span></text:span><text:span text:style-name="Strong_20_Emphasis"><text:span text:style-name="T168">';<text:line-break/>grant all privileges on zabbix.* to ‘</text:span></text:span><text:span text:style-name="Strong_20_Emphasis"><text:span text:style-name="T189">zabbix</text:span></text:span><text:span text:style-name="Strong_20_Emphasis"><text:span text:style-name="T168">’@’</text:span></text:span><text:span text:style-name="Strong_20_Emphasis"><text:span text:style-name="T190">10.0.1.10’</text:span></text:span><text:span text:style-name="Strong_20_Emphasis"><text:span text:style-name="T168"> identified by '</text:span></text:span><text:span text:style-name="Strong_20_Emphasis"><text:span text:style-name="T191">PrimaStack123!</text:span></text:span><text:span text:style-name="Strong_20_Emphasis"><text:span text:style-name="T168">';<text:line-break/>set global log_bin_trust_function_creators = 1;<text:line-break/>quit</text:span></text:span></text:h>
      <text:h text:style-name="P108" text:outline-level="2"><text:span text:style-name="Strong_20_Emphasis"><text:span text:style-name="T112">[Continue with </text:span></text:span><text:span text:style-name="Strong_20_Emphasis"><text:span text:style-name="T123">third</text:span></text:span><text:span text:style-name="Strong_20_Emphasis"><text:span text:style-name="T112"> steps in </text:span></text:span><text:span text:style-name="Strong_20_Emphasis"><text:span text:style-name="T124">4</text:span></text:span><text:span text:style-name="Strong_20_Emphasis"><text:span text:style-name="T112">.</text:span></text:span><text:span text:style-name="Strong_20_Emphasis"><text:span text:style-name="T124">1</text:span></text:span><text:span text:style-name="Strong_20_Emphasis"><text:span text:style-name="T112">]</text:span></text:span></text:h>
      <text:h text:style-name="P62" text:outline-level="2"><text:span text:style-name="T207">3</text:span><text:span text:style-name="T88">rd</text:span><text:span text:style-name="T207"> </text:span><text:span text:style-name="T205">steps – </text:span><text:span text:style-name="T203">Further</text:span><text:span text:style-name="T202"> Configuration </text:span><text:span text:style-name="T204">&amp; Create Database</text:span></text:h>
      <text:h text:style-name="P114" text:outline-level="2"><text:span text:style-name="T194">sudo mysql -u root -p<text:line-break/></text:span><text:span text:style-name="Strong_20_Emphasis"><text:span text:style-name="T175">set global log_bin_trust_function_creators = 1;<text:line-break/>quit</text:span></text:span></text:h>
      <text:h text:style-name="P87" text:outline-level="2"><text:span text:style-name="Strong_20_Emphasis"><text:span text:style-name="T20">4.</text:span></text:span><text:span text:style-name="Strong_20_Emphasis"><text:span text:style-name="T28">3</text:span></text:span><text:span text:style-name="Strong_20_Emphasis"><text:span text:style-name="T20"> Zabbix 7.0 </text:span></text:span><text:span text:style-name="Strong_20_Emphasis"><text:span text:style-name="T29">Agent</text:span></text:span></text:h>
      <text:h text:style-name="P88" text:outline-level="2"><text:span text:style-name="Strong_20_Emphasis"><text:span text:style-name="T17">After setup of 4.1 and 4.2, an Zabbix agent is installed on the Zabbix host for test purposes.</text:span></text:span></text:h>
      <text:h text:style-name="P88" text:outline-level="2"><text:span text:style-name="Strong_20_Emphasis"><text:span text:style-name="T17">sudo apt install zabbix-agent<text:line-break/>sudo nano /etc/zabbix/zabbix_agentd.conf</text:span></text:span></text:h>
      <text:h text:style-name="P88" text:outline-level="2"><text:span text:style-name="Strong_20_Emphasis"><text:span text:style-name="T80">Server=</text:span></text:span><text:span text:style-name="Strong_20_Emphasis"><text:span text:style-name="T81">127.0.0.1, </text:span></text:span><text:span text:style-name="Strong_20_Emphasis"><text:span text:style-name="T80">10.0.1.10<text:line-break/>ServerActive=10.0.1.10<text:line-break/>Hostname=Zabbix-One</text:span></text:span></text:h>
      <text:h text:style-name="P88" text:outline-level="2"><text:span text:style-name="Strong_20_Emphasis"><text:span text:style-name="T210">sudo systemctl enable zabbix-agent<text:line-break/>sudo systemctl restart zabbix-agent</text:span></text:span></text:h>
      <text:h text:style-name="P120" text:outline-level="1"><text:span text:style-name="T109">5</text:span>. Installations – <text:span text:style-name="T108">High Availability </text:span></text:h>
      <text:p text:style-name="P41"><text:span text:style-name="T195">Zabbix-one (10.0.1.11)<text:tab/></text:span><text:span text:style-name="T110">(</text:span><text:span text:style-name="Strong_20_Emphasis"><text:span text:style-name="T110">192.168.0.1</text:span></text:span><text:span text:style-name="T110">)</text:span><text:span text:style-name="T195"><text:line-break/>Zabbix-two (10.0.1.21)<text:tab/>(</text:span><text:span text:style-name="Strong_20_Emphasis"><text:span text:style-name="T195">192.168.0.2</text:span></text:span><text:span text:style-name="T195">)<text:line-break/></text:span><text:span text:style-name="T196">zabbix-db (10.0.1.23)<text:tab/><text:tab/>(</text:span><text:span text:style-name="Strong_20_Emphasis"><text:span text:style-name="T196">192.168.0.10</text:span></text:span><text:span text:style-name="T196">)</text:span></text:p>
      <text:p text:style-name="P32">5.1 SSH Config (Local)</text:p>
      <text:p text:style-name="P14">Host ansible-center<text:line-break/><text:tab/>HostName 194.47.155.153<text:line-break/><text:tab/>User ubuntu<text:line-break/><text:tab/>IdentityFile ~/.ssh/PRIMA-KEY-PRIVATE.pem</text:p>
      <text:p text:style-name="P14">Host zabbix-one<text:line-break/><text:tab/>HostName 10.0.1.11<text:line-break/><text:tab/>User ubuntu<text:line-break/><text:tab/>ProxyJump ansible-center<text:line-break/><text:tab/>IdentityFile ~/.ssh/PRIMA-KEY-PRIVATE.pem</text:p>
      <text:p text:style-name="P13">Host zabbix-two<text:line-break/><text:tab/>HostName 10.0.1.21<text:line-break/><text:tab/>User ubuntu<text:line-break/><text:tab/>ProxyJump ansible-center<text:line-break/><text:tab/>IdentityFile ~/.ssh/PRIMA-KEY-PRIVATE.pem</text:p>
      <text:p text:style-name="P13">Host zabbix-db<text:line-break/><text:tab/>HostName 10.0.1.23<text:line-break/><text:tab/>User ubuntu<text:line-break/><text:tab/>ProxyJump ansible-center<text:line-break/><text:tab/>IdentityFile ~/.ssh/PRIMA-KEY-PRIVATE.pem</text:p>
      <text:p text:style-name="P19"><text:span text:style-name="T20">5.</text:span><text:span text:style-name="T25">2</text:span><text:span text:style-name="T20"> Zabbix </text:span><text:span text:style-name="T25">DB</text:span></text:p>
      <text:h text:style-name="P93" text:outline-level="2"><text:span text:style-name="T26">1</text:span><text:span text:style-name="T89">st</text:span><text:span text:style-name="T20"> steps – </text:span><text:span text:style-name="T27">Initial Configuration</text:span></text:h>
      <text:h text:style-name="P109" text:outline-level="2"><text:span text:style-name="Strong_20_Emphasis"><text:span text:style-name="T168">wget </text:span></text:span><text:a xlink:type="simple" xlink:href="https://downloads.mariadb.com/MariaDB/mariadb_repo_setup" text:style-name="Internet_20_link" text:visited-style-name="Visited_20_Internet_20_Link"><text:span text:style-name="Strong_20_Emphasis"><text:span text:style-name="T168">https://downloads.mariadb.com/MariaDB/mariadb_repo_setup</text:span></text:span></text:a><text:span text:style-name="Strong_20_Emphasis"><text:span text:style-name="T168"><text:line-break/>chmod +x mariadb_repo_setup<text:line-break/></text:span></text:span><text:span text:style-name="Strong_20_Emphasis"><text:span text:style-name="T173">sudo </text:span></text:span><text:span text:style-name="Strong_20_Emphasis"><text:span text:style-name="T168">./mariadb_repo_setup<text:line-break/></text:span></text:span><text:span text:style-name="Strong_20_Emphasis"><text:span text:style-name="T174">sudo </text:span></text:span><text:span text:style-name="Strong_20_Emphasis"><text:span text:style-name="T172">apt install mariadb-server<text:line-break/></text:span></text:span><text:span text:style-name="Strong_20_Emphasis"><text:span text:style-name="T174">sudo </text:span></text:span><text:span text:style-name="Strong_20_Emphasis"><text:span text:style-name="T168">systemctl enable mariadb<text:line-break/></text:span></text:span><text:span text:style-name="Strong_20_Emphasis"><text:span text:style-name="T174">sudo </text:span></text:span><text:span text:style-name="Strong_20_Emphasis"><text:span text:style-name="T168">systemctl start mariadb<text:line-break/></text:span></text:span><text:span text:style-name="T172">sudo mariadb-secure-installation</text:span></text:h>
      <text:p text:style-name="P53"><text:span text:style-name="T193">For this assignment, no root passwords were created for the DB.<text:line-break/></text:span><text:span text:style-name="T180">Switch to unix_socket authentication [Y/n] Y<text:line-break/>Change the root password? [Y/n] n<text:line-break/>Remove anonymous users? [Y/n] n<text:line-break/>Disallow root login remotely? [Y/n] n<text:line-break/>Remove test database and access to it? [Y/n] n<text:line-break/>Reload privilege tables now? [Y/n] Y</text:span></text:p>
      <text:p text:style-name="P53"><text:span text:style-name="Strong_20_Emphasis"><text:span text:style-name="T112">sudo mariadb -u root -p<text:line-break/></text:span></text:span><text:span text:style-name="Strong_20_Emphasis"><text:span text:style-name="T114">create database zabbix character set utf8mb4 collate utf8mb4_bin;<text:line-break/>CREATE USER 'zabbix'@'</text:span></text:span><text:span text:style-name="Strong_20_Emphasis"><text:span text:style-name="T156">10.0.1.%</text:span></text:span><text:span text:style-name="Strong_20_Emphasis"><text:span text:style-name="T114">' IDENTIFIED BY </text:span></text:span><text:span text:style-name="Strong_20_Emphasis"><text:span text:style-name="T112"><text:s/>'</text:span></text:span><text:span text:style-name="Strong_20_Emphasis"><text:span text:style-name="T146">PrimaStack123!</text:span></text:span><text:span text:style-name="Strong_20_Emphasis"><text:span text:style-name="T112">';<text:line-break/>GRANT ALL PRIVILEGES ON zabbix.* TO 'zabbix'@'10.0.1.%';<text:line-break/>set global log_bin_trust_function_creators = 1;<text:line-break/>quit</text:span></text:span></text:p>
      <text:h text:style-name="P117" text:outline-level="2"><text:soft-page-break/><text:span text:style-name="Strong_20_Emphasis"><text:span text:style-name="T112">wget https://repo.zabbix.com/zabbix/7.0/ubuntu/pool/main/z/zabbix-release/zabbix-release_7.0-1+ubuntu2</text:span></text:span><text:span text:style-name="Strong_20_Emphasis"><text:span text:style-name="T133">4</text:span></text:span><text:span text:style-name="Strong_20_Emphasis"><text:span text:style-name="T112">.04_all.deb</text:span></text:span></text:h>
      <text:p text:style-name="P39"><text:span text:style-name="Strong_20_Emphasis"><text:span text:style-name="T169">sudo </text:span></text:span><text:span text:style-name="Strong_20_Emphasis"><text:span text:style-name="T168">dpkg -i zabbix-release_7.0-1+ubuntu2</text:span></text:span><text:span text:style-name="Strong_20_Emphasis"><text:span text:style-name="T181">4</text:span></text:span><text:span text:style-name="Strong_20_Emphasis"><text:span text:style-name="T168">.04_all.deb</text:span></text:span></text:p>
      <text:p text:style-name="P40"><text:span text:style-name="Strong_20_Emphasis"><text:span text:style-name="T169">sudo </text:span></text:span><text:span text:style-name="Strong_20_Emphasis"><text:span text:style-name="T168">apt</text:span></text:span><text:bookmark text:name="_idTextAnchor089"/><text:span text:style-name="Strong_20_Emphasis"><text:span text:style-name="T168"> update<text:line-break/></text:span></text:span><text:span text:style-name="Strong_20_Emphasis"><text:span text:style-name="T113">sudo </text:span></text:span><text:span text:style-name="Strong_20_Emphasis"><text:span text:style-name="T138">apt install zabbix-sql-scripts<text:line-break/></text:span></text:span><text:span text:style-name="Strong_20_Emphasis"><text:span text:style-name="T113">sudo zcat /usr/share/zabbix-sql-scripts/mysql/server.sql.gz <text:s/>| sudo mariadb zabbix<text:line-break/>sudo mariadb </text:span></text:span><text:span text:style-name="Strong_20_Emphasis"><text:span text:style-name="T167">-u root -p</text:span></text:span><text:span text:style-name="Strong_20_Emphasis"><text:span text:style-name="T113"><text:line-break/></text:span></text:span><text:span text:style-name="Strong_20_Emphasis"><text:span text:style-name="T168">set global log_bin_trust_function_creators = 0;<text:line-break/>quit;</text:span></text:span></text:p>
      <text:p text:style-name="P40"><text:span text:style-name="Strong_20_Emphasis"><text:span text:style-name="T168">sudo nano /etc/mysql/mariadb.conf.d/50-server.cnf<text:line-break/>bind-address = </text:span></text:span><text:span text:style-name="Strong_20_Emphasis"><text:span text:style-name="T189">127.0.0.1</text:span></text:span><text:span text:style-name="Strong_20_Emphasis"><text:span text:style-name="T168"> → bind-address =</text:span></text:span><text:span text:style-name="Strong_20_Emphasis"><text:span text:style-name="T189"> 0.0.0.0</text:span></text:span><text:span text:style-name="Strong_20_Emphasis"><text:span text:style-name="T168"><text:line-break/>sudo systemctl restart mariadb</text:span></text:span></text:p>
      <text:p text:style-name="P31">5.<text:span text:style-name="T201">3</text:span> Zabbix 7.0</text:p>
      <text:p text:style-name="P44"><text:span text:style-name="Strong_20_Emphasis"><text:span text:style-name="T192">5.3.1 Basic Setup</text:span></text:span></text:p>
      <text:p text:style-name="P43"><text:span text:style-name="Strong_20_Emphasis"><text:span text:style-name="T168">wget https://repo.zabbix.com/zabbix/7.0/ubuntu/pool/main/z/zabbix-release/zabbix-release_7.0-1+ubuntu2</text:span></text:span><text:span text:style-name="Strong_20_Emphasis"><text:span text:style-name="T170">4</text:span></text:span><text:span text:style-name="Strong_20_Emphasis"><text:span text:style-name="T168">.04_all.deb</text:span></text:span></text:p>
      <text:p text:style-name="Preformatted_20_Text"><text:span text:style-name="Strong_20_Emphasis"><text:span text:style-name="T170">sudo </text:span></text:span><text:span text:style-name="Strong_20_Emphasis"><text:span text:style-name="T168">dpkg -i zabbix-release_7.0-1+ubuntu2</text:span></text:span><text:span text:style-name="Strong_20_Emphasis"><text:span text:style-name="T170">4</text:span></text:span><text:span text:style-name="Strong_20_Emphasis"><text:span text:style-name="T168">.04_all.deb</text:span></text:span></text:p>
      <text:p text:style-name="P55"><text:span text:style-name="Strong_20_Emphasis"><text:span text:style-name="T170">sudo </text:span></text:span><text:span text:style-name="Strong_20_Emphasis"><text:span text:style-name="T168">apt update<text:line-break/></text:span></text:span><text:span text:style-name="T170">sudo </text:span><text:span text:style-name="Strong_20_Emphasis"><text:span text:style-name="T168">apt install zabbix-server-mysql<text:line-break/></text:span></text:span><text:span text:style-name="Strong_20_Emphasis"><text:span text:style-name="T176">sudo </text:span></text:span><text:span text:style-name="Strong_20_Emphasis"><text:span text:style-name="T178">vim /etc/zabbix/zabbix_server.conf</text:span></text:span></text:p>
      <text:p text:style-name="P55"><text:span text:style-name="Strong_20_Emphasis"><text:span text:style-name="T197"><text:line-break/></text:span></text:span><text:span text:style-name="Strong_20_Emphasis"><text:span text:style-name="T139"><text:tab/></text:span></text:span><text:span text:style-name="T142"># DBPassword → </text:span><text:span text:style-name="T139"><text:s/></text:span><text:span text:style-name="T142">DBPassword=</text:span><text:span text:style-name="T154">PrimaStack123!</text:span><text:span text:style-name="T142"><text:tab/><text:tab/><text:tab/></text:span><text:span text:style-name="T143">(On Zabbix-one)</text:span><text:span text:style-name="T142"><text:line-break/><text:tab/># DBHost=localhost → DB</text:span><text:span text:style-name="T140">Host</text:span><text:span text:style-name="T142">= </text:span><text:span text:style-name="T155">10.0.1.23</text:span><text:span text:style-name="T141"><text:line-break/><text:tab/></text:span><text:span text:style-name="T142">HANodeName=</text:span><text:span text:style-name="T154">zabbix-one</text:span><text:span text:style-name="T142"><text:line-break/><text:tab/>NodeAddress=</text:span><text:span text:style-name="T154">10.0.1.11</text:span></text:p>
      <text:p text:style-name="P46"><text:span text:style-name="T139"><text:tab/># </text:span><text:span text:style-name="T137">DBPassword → </text:span><text:span text:style-name="T139"><text:s/></text:span><text:span text:style-name="T137">DBPassword=</text:span><text:span text:style-name="T144">PrimaStack123!</text:span><text:span text:style-name="T137"><text:tab/><text:tab/><text:tab/></text:span><text:span text:style-name="T143">(On Zabbix-two)</text:span><text:span text:style-name="T137"><text:line-break/><text:tab/># DBHost=localhost → DB</text:span><text:span text:style-name="T140">Host</text:span><text:span text:style-name="T137">= </text:span><text:span text:style-name="T155">10.0.1.23</text:span></text:p>
      <text:p text:style-name="P15"><text:tab/>HANodeName=<text:span text:style-name="T20">zabbix-</text:span><text:span text:style-name="T30">two</text:span><text:line-break/><text:tab/>NodeAddress=<text:span text:style-name="T20">10.0.1.</text:span><text:span text:style-name="T31">2</text:span><text:span text:style-name="T20">1</text:span></text:p>
      <text:p text:style-name="P18"><text:span text:style-name="Strong_20_Emphasis"><text:span text:style-name="T16">sudo </text:span></text:span><text:span text:style-name="Strong_20_Emphasis"><text:span text:style-name="T11">systemctl enable zabbix-server</text:span></text:span></text:p>
      <text:p text:style-name="P42"><text:span text:style-name="Strong_20_Emphasis"><text:span text:style-name="T177">sudo </text:span></text:span><text:span text:style-name="Strong_20_Emphasis"><text:span text:style-name="T168">systemctl start zabbix-server</text:span></text:span></text:p>
      <text:p text:style-name="P44"><text:span text:style-name="Strong_20_Emphasis"><text:span text:style-name="T192"/></text:span></text:p>
      <text:p text:style-name="P45"><text:span text:style-name="Strong_20_Emphasis"><text:span text:style-name="T192">5.3.2 Keepalived Setup</text:span></text:span></text:p>
      <text:p text:style-name="P44"><text:span text:style-name="Strong_20_Emphasis"><text:span text:style-name="T192"/></text:span></text:p>
      <text:p text:style-name="P54"><text:span text:style-name="T198">sudo </text:span><text:span text:style-name="Strong_20_Emphasis">apt install keepalived<text:line-break/></text:span><text:span text:style-name="Strong_20_Emphasis"><text:span text:style-name="T208">sudo </text:span></text:span><text:span text:style-name="Strong_20_Emphasis">vim /etc/keepalived/</text:span><text:bookmark text:name="_idTextAnchor094"/><text:span text:style-name="Strong_20_Emphasis">keepalived.conf</text:span></text:p>
      <text:section text:style-name="Sect1" text:name="Section1">
        <text:p text:style-name="P9">global_defs {</text:p>
        <text:p text:style-name="P9"><text:s text:c="4"/>enable_script_security</text:p>
        <text:p text:style-name="P9">}</text:p>
        <text:p text:style-name="P9"/>
        <text:p text:style-name="P9">vrrp_script chk_nginx {</text:p>
        <text:p text:style-name="P9"><text:s text:c="4"/>script "/usr/bin/pgrep nginx"</text:p>
        <text:p text:style-name="P9"><text:s text:c="4"/>interval 2</text:p>
        <text:p text:style-name="P9"><text:s text:c="4"/>weight 10</text:p>
        <text:p text:style-name="P9">}</text:p>
        <text:p text:style-name="P9"/>
        <text:p text:style-name="P9">vrrp_instance ZBX_1 {</text:p>
        <text:p text:style-name="P9"><text:s text:c="4"/>state MASTER</text:p>
        <text:p text:style-name="P9"><text:s text:c="4"/>interface ens3</text:p>
        <text:p text:style-name="P9"><text:s text:c="4"/>virtual_router_id 51</text:p>
        <text:p text:style-name="P9"><text:s text:c="4"/>priority 244</text:p>
        <text:p text:style-name="P9"><text:s text:c="4"/>advert_int 1</text:p>
        <text:p text:style-name="P9"/>
        <text:p text:style-name="P9"><text:s text:c="4"/>authentication {</text:p>
        <text:p text:style-name="P9"><text:s text:c="8"/>auth_type PASS</text:p>
        <text:p text:style-name="P9"><text:s text:c="8"/>auth_pass PrimaStack123!</text:p>
        <text:p text:style-name="P9"><text:s text:c="4"/>}</text:p>
        <text:p text:style-name="P9"/>
        <text:p text:style-name="P9"><text:s text:c="4"/>track_script {</text:p>
        <text:p text:style-name="P9"><text:s text:c="8"/>chk_nginx</text:p>
        <text:p text:style-name="P9"><text:s text:c="4"/>}</text:p>
        <text:p text:style-name="P9"/>
        <text:p text:style-name="P9"><text:s text:c="4"/>unicast_src_ip 10.0.1.11</text:p>
        <text:p text:style-name="P9"/>
        <text:p text:style-name="P9"><text:s text:c="4"/>unicast_peer {</text:p>
        <text:p text:style-name="P9"><text:s text:c="8"/>10.0.1.21</text:p>
        <text:p text:style-name="P9"><text:s text:c="4"/>}</text:p>
        <text:p text:style-name="P9"/>
        <text:p text:style-name="P9"><text:s text:c="4"/>virtual_ipaddress {</text:p>
        <text:p text:style-name="P9"><text:s text:c="8"/>10.0.1.29/27</text:p>
        <text:p text:style-name="P9"><text:s text:c="4"/>}</text:p>
        <text:p text:style-name="P9">}</text:p>
        <text:p text:style-name="P20">global_defs {</text:p>
        <text:p text:style-name="P20"><text:s text:c="4"/>enable_script_security</text:p>
        <text:p text:style-name="P20">}</text:p>
        <text:p text:style-name="P20"/>
        <text:p text:style-name="P20">vrrp_script chk_nginx {</text:p>
        <text:p text:style-name="P20"><text:s text:c="4"/>script "/usr/bin/pgrep nginx"</text:p>
        <text:p text:style-name="P20"><text:s text:c="4"/>interval 2</text:p>
        <text:p text:style-name="P20"><text:s text:c="4"/>weight 10</text:p>
        <text:p text:style-name="P20">}</text:p>
        <text:p text:style-name="P20"/>
        <text:p text:style-name="P20">vrrp_instance ZBX_1 {</text:p>
        <text:p text:style-name="P20"><text:s text:c="4"/>state MASTER</text:p>
        <text:p text:style-name="P20"><text:s text:c="4"/>interface ens3</text:p>
        <text:p text:style-name="P20"><text:s text:c="4"/>virtual_router_id 51</text:p>
        <text:p text:style-name="P20"><text:s text:c="4"/>priority 24<text:span text:style-name="T209">3</text:span></text:p>
        <text:p text:style-name="P20"><text:s text:c="4"/>advert_int 1</text:p>
        <text:p text:style-name="P20"/>
        <text:p text:style-name="P20"><text:s text:c="4"/>authentication {</text:p>
        <text:p text:style-name="P20"><text:s text:c="8"/>auth_type PASS</text:p>
        <text:p text:style-name="P20"><text:s text:c="8"/>auth_pass PrimaStack123!</text:p>
        <text:p text:style-name="P20"><text:s text:c="4"/>}</text:p>
        <text:p text:style-name="P20"/>
        <text:p text:style-name="P20"><text:s text:c="4"/>track_script {</text:p>
        <text:p text:style-name="P20"><text:s text:c="8"/>chk_nginx</text:p>
        <text:p text:style-name="P20"><text:s text:c="4"/>}</text:p>
        <text:p text:style-name="P20"/>
        <text:p text:style-name="P20"><text:s text:c="4"/>unicast_src_ip 10.0.1.<text:span text:style-name="T209">21</text:span></text:p>
        <text:p text:style-name="P20"/>
        <text:p text:style-name="P20"><text:s text:c="4"/>unicast_peer {</text:p>
        <text:p text:style-name="P20"><text:s text:c="8"/>10.0.1.<text:span text:style-name="T209">11</text:span></text:p>
        <text:p text:style-name="P20"><text:s text:c="4"/>}</text:p>
        <text:p text:style-name="P20"/>
        <text:p text:style-name="P20"><text:s text:c="4"/>virtual_ipaddress {</text:p>
        <text:p text:style-name="P20"><text:s text:c="8"/>10.0.1.29/27</text:p>
        <text:p text:style-name="P20"><text:s text:c="4"/>}</text:p>
        <text:p text:style-name="P20">}</text:p>
      </text:section>
      <text:p text:style-name="P49"><text:span text:style-name="Strong_20_Emphasis"><text:span text:style-name="T186">sudo </text:span></text:span><text:span text:style-name="Strong_20_Emphasis"><text:span text:style-name="T184">apt install nginx zabbix-frontend-php zabbix-nginx-conf<text:line-break/></text:span></text:span><text:span text:style-name="T186">sudo nano </text:span><text:span text:style-name="Strong_20_Emphasis"><text:span text:style-name="T184">/etc/zabbix/nginx.conf<text:line-break/><text:tab/> </text:span></text:span><text:span text:style-name="T199"># <text:s text:c="7"/>listen <text:s text:c="9"/>8080;<text:tab/><text:tab/><text:tab/>→ listen 80;<text:line-break/><text:tab/> # <text:s text:c="7"/>server_name <text:s text:c="4"/>example.com;<text:tab/>→ server_name 10.0.1.100;<text:line-break/><text:tab/><text:tab/></text:span><text:span text:style-name="Strong_20_Emphasis"><text:span text:style-name="T130">fastcgi_pass unix:/run/php/</text:span></text:span><text:span text:style-name="Strong_20_Emphasis"><text:span text:style-name="T131">php8.3-fpm.sock</text:span></text:span></text:p>
      <text:p text:style-name="P50"><text:span text:style-name="Strong_20_Emphasis"><text:span text:style-name="T161">sudo rm /etc/nginx/sites-enabled/default<text:line-break/></text:span></text:span><text:span text:style-name="Strong_20_Emphasis"><text:span text:style-name="T162">sudo </text:span></text:span><text:span text:style-name="Strong_20_Emphasis"><text:span text:style-name="T163">systemctl enable nginx<text:line-break/></text:span></text:span><text:span text:style-name="Strong_20_Emphasis"><text:span text:style-name="T162">sudo </text:span></text:span><text:span text:style-name="Strong_20_Emphasis"><text:span text:style-name="T184">systemctl restart nginx php8.3-fpm<text:tab/></text:span></text:span><text:span text:style-name="Strong_20_Emphasis"><text:span text:style-name="T185">(can be found as shown above)</text:span></text:span><text:span text:style-name="Strong_20_Emphasis"><text:span text:style-name="T168"><text:line-break/></text:span></text:span><text:span text:style-name="Strong_20_Emphasis"><text:span text:style-name="T179">sudo </text:span></text:span><text:span text:style-name="Strong_20_Emphasis"><text:span text:style-name="T168">systemctl start nginx keepalived</text:span></text:span></text:p>
      <text:p text:style-name="P21"><text:span text:style-name="Strong_20_Emphasis"><text:span text:style-name="T101">10051 10.0.1.10</text:span></text:span></text:p>
      <text:p text:style-name="P56"><text:span text:style-name="Strong_20_Emphasis"><text:span text:style-name="T105">sudo </text:span></text:span><text:span text:style-name="Strong_20_Emphasis"><text:span text:style-name="T106">nano</text:span></text:span><text:span text:style-name="Strong_20_Emphasis"><text:span text:style-name="T105"> <text:s/>/etc/zabbix/web/zabbix.conf.php</text:span></text:span></text:p>
      <text:p text:style-name="P51"><text:span text:style-name="Strong_20_Emphasis"><text:span text:style-name="T96">&lt;?php</text:span></text:span></text:p>
      <text:p text:style-name="P21"><text:span text:style-name="T97">$DB</text:span>[<text:span text:style-name="T99">'TYPE'</text:span>] <text:s text:c="4"/>= <text:span text:style-name="T99">'MYSQL'</text:span>;</text:p>
      <text:p text:style-name="P21"><text:span text:style-name="T97">$DB</text:span>[<text:span text:style-name="T99">'SERVER'</text:span>] <text:s text:c="2"/>= <text:span text:style-name="T99">'10.0.1.2</text:span><text:span text:style-name="T100">3</text:span><text:span text:style-name="T99">'</text:span>;</text:p>
      <text:p text:style-name="P21"><text:span text:style-name="T97">$DB</text:span>[<text:span text:style-name="T99">'PORT'</text:span>] <text:s text:c="4"/>= <text:span text:style-name="T99">'3306'</text:span>;</text:p>
      <text:p text:style-name="P21"><text:span text:style-name="T97">$DB</text:span>[<text:span text:style-name="T99">'DATABASE'</text:span>] = <text:span text:style-name="T99">'zabbix'</text:span>;</text:p>
      <text:p text:style-name="P21"><text:span text:style-name="T97">$DB</text:span>[<text:span text:style-name="T99">'USER'</text:span>] <text:s text:c="4"/>= <text:span text:style-name="T99">'zabbix'</text:span>;</text:p>
      <text:p text:style-name="P51"><text:span text:style-name="T98">$DB</text:span><text:span text:style-name="T110">[</text:span><text:span text:style-name="T102">'PASSWORD'</text:span><text:span text:style-name="T110">] = </text:span><text:span text:style-name="T102">'</text:span><text:span text:style-name="Strong_20_Emphasis"><text:span text:style-name="T104">PrimaStack123</text:span></text:span><text:span text:style-name="Strong_20_Emphasis"><text:span text:style-name="T103">!</text:span></text:span><text:span text:style-name="T102">'</text:span><text:span text:style-name="T110">;</text:span></text:p>
      <text:p text:style-name="P21"/>
      <text:p text:style-name="P21"><text:span text:style-name="T97">$ZBX_SERVER</text:span> <text:s text:c="5"/>= <text:span text:style-name="T99">'localhost'</text:span>;</text:p>
      <text:p text:style-name="P21"><text:span text:style-name="T97">$ZBX_SERVER_PORT</text:span> = <text:span text:style-name="T99">'10051'</text:span>;</text:p>
      <text:p text:style-name="P21"/>
      <text:p text:style-name="P21"><text:span text:style-name="T97">$ZBX_SERVER_NAME</text:span> = <text:span text:style-name="T99">'Zabbix'</text:span>;</text:p>
      <text:p text:style-name="P48">?&gt;</text:p>
      <text:p text:style-name="P52"><text:span text:style-name="Strong_20_Emphasis"><text:span text:style-name="T62">sudo systemctl restart zabbix-server<text:line-break/>sudo systemctl restart nginx<text:line-break/>sudo systemctl restart php8.3-fpm</text:span></text:span></text:p>
      <text:p text:style-name="P53"><text:span text:style-name="Strong_20_Emphasis"><text:span text:style-name="T187">Test: ssh -L 8080:10.0.1.11:80 </text:span></text:span><text:a xlink:type="simple" xlink:href="mailto:ubuntu@ansible-center" text:style-name="Internet_20_link" text:visited-style-name="Visited_20_Internet_20_Link"><text:span text:style-name="Strong_20_Emphasis"><text:span text:style-name="T187">ubuntu@ansible-center</text:span></text:span></text:a><text:span text:style-name="Strong_20_Emphasis"><text:span text:style-name="T187"><text:tab/>→ <text:s/></text:span></text:span><text:a xlink:type="simple" xlink:href="http://localhost:8080/" text:style-name="Internet_20_link" text:visited-style-name="Visited_20_Internet_20_Link"><text:span text:style-name="Strong_20_Emphasis"><text:span text:style-name="T187">http://localhost:8080</text:span></text:span></text:a><text:span text:style-name="Strong_20_Emphasis"><text:span text:style-name="T187"><text:tab/>→ </text:span></text:span><text:span text:style-name="Strong_20_Emphasis"><text:span text:style-name="T188">(Admin;zabbix)</text:span></text:span></text:p>
      <text:h text:style-name="P89" text:outline-level="2"><text:span text:style-name="Strong_20_Emphasis"><text:span text:style-name="T32">5</text:span></text:span><text:span text:style-name="Strong_20_Emphasis"><text:span text:style-name="T20">.</text:span></text:span><text:span text:style-name="Strong_20_Emphasis"><text:span text:style-name="T28">3</text:span></text:span><text:span text:style-name="Strong_20_Emphasis"><text:span text:style-name="T20"> Zabbix 7.0 </text:span></text:span><text:span text:style-name="Strong_20_Emphasis"><text:span text:style-name="T29">Agent</text:span></text:span></text:h>
      <text:h text:style-name="P89" text:outline-level="2"><text:span text:style-name="Strong_20_Emphasis"><text:span text:style-name="T17">After setup of 4.1 and 4.2, an Zabbix agent is installed on the Zabbix host for test purposes.</text:span></text:span></text:h>
      <text:h text:style-name="P89" text:outline-level="2"><text:span text:style-name="Strong_20_Emphasis"><text:span text:style-name="T17">sudo apt install zabbix-agent<text:line-break/>sudo nano /etc/zabbix/zabbix_agentd.conf</text:span></text:span></text:h>
      <text:h text:style-name="P110" text:outline-level="2"><text:span text:style-name="Strong_20_Emphasis"><text:span text:style-name="T134">Server=</text:span></text:span><text:span text:style-name="Strong_20_Emphasis"><text:span text:style-name="T135">127.0.0.1, </text:span></text:span><text:span text:style-name="Strong_20_Emphasis"><text:span text:style-name="T134">10.0.1.10<text:tab/><text:tab/></text:span></text:span><text:span text:style-name="Strong_20_Emphasis"><text:span text:style-name="T136">(</text:span></text:span><text:span text:style-name="Strong_20_Emphasis"><text:span text:style-name="T83">“Which Zabbix servers are allowed to query this agent?”</text:span></text:span><text:span text:style-name="Strong_20_Emphasis"><text:span text:style-name="T136">)</text:span></text:span><text:span text:style-name="Strong_20_Emphasis"><text:span text:style-name="T134"><text:line-break/>ServerActive=10.0.1.10<text:line-break/>Hostname=Zabbix-One</text:span></text:span></text:h>
      <text:h text:style-name="P89" text:outline-level="2"><text:span text:style-name="Strong_20_Emphasis"><text:span text:style-name="T210">sudo systemctl enable zabbix-agent<text:line-break/>sudo systemctl restart zabbix-agent</text:span></text:span></text:h>
      <text:h text:style-name="P90" text:outline-level="2"><text:span text:style-name="Strong_20_Emphasis"><text:span text:style-name="T225">5</text:span></text:span><text:span text:style-name="Strong_20_Emphasis"><text:span text:style-name="T224">.4. TEST:</text:span></text:span><text:span text:style-name="Strong_20_Emphasis"><text:span text:style-name="T211"><text:line-break/></text:span></text:span><text:span text:style-name="Strong_20_Emphasis"><text:span text:style-name="T212">1. </text:span></text:span><text:span text:style-name="Strong_20_Emphasis"><text:span text:style-name="T211">On local machine (Make sure .ssh/config is set, </text:span></text:span><text:span text:style-name="Strong_20_Emphasis"><text:span text:style-name="T212">so you can access the tunnel</text:span></text:span><text:span text:style-name="Strong_20_Emphasis"><text:span text:style-name="T211">)<text:line-break/>→ </text:span></text:span><text:span text:style-name="Strong_20_Emphasis"><text:span text:style-name="T213">ssh -L 8080:</text:span></text:span><text:span text:style-name="Strong_20_Emphasis"><text:span text:style-name="T214">&lt;</text:span></text:span><text:span text:style-name="Strong_20_Emphasis"><text:span text:style-name="T216">IP_TO_ZABBIX_ONE</text:span></text:span><text:span text:style-name="Strong_20_Emphasis"><text:span text:style-name="T214">&gt;</text:span></text:span><text:span text:style-name="Strong_20_Emphasis"><text:span text:style-name="T213">:80 </text:span></text:span><text:a xlink:type="simple" xlink:href="mailto:ubuntu@ansible-center" text:style-name="Internet_20_link" text:visited-style-name="Visited_20_Internet_20_Link"><text:span text:style-name="Strong_20_Emphasis"><text:span text:style-name="T213">ubuntu@ansible-center</text:span></text:span></text:a><text:span text:style-name="Strong_20_Emphasis"><text:span text:style-name="T213"><text:line-break/><text:line-break/></text:span></text:span><text:span text:style-name="Strong_20_Emphasis"><text:span text:style-name="T220">2</text:span></text:span><text:span text:style-name="Strong_20_Emphasis"><text:span text:style-name="T221">. </text:span></text:span><text:span text:style-name="Strong_20_Emphasis"><text:span text:style-name="T222">Access localhost:8080 on you machine, and login (Admin;zabbi</text:span></text:span><text:span text:style-name="Strong_20_Emphasis"><text:span text:style-name="T223">x)<text:line-break/></text:span></text:span><text:span text:style-name="Strong_20_Emphasis"><text:span text:style-name="T214">→ </text:span></text:span><text:span text:style-name="Strong_20_Emphasis"><text:span text:style-name="T215">Reports → System Information :</text:span></text:span></text:h>
      <text:h text:style-name="P111" text:outline-level="2"><text:span text:style-name="Strong_20_Emphasis"><text:span text:style-name="T200">- High availability cluster : Should be enabled<text:line-break/>- </text:span></text:span><text:span text:style-name="Strong_20_Emphasis"><text:span text:style-name="T215">zabbix-two</text:span></text:span><text:span text:style-name="Strong_20_Emphasis"><text:span text:style-name="T200"> and zabbix-two should be listed, and which one is active will be shown</text:span></text:span></text:h>
      <text:h text:style-name="P91" text:outline-level="2"><text:span text:style-name="Strong_20_Emphasis"><text:span text:style-name="T221">3. Failover Test</text:span></text:span></text:h>
      <text:h text:style-name="P92" text:outline-level="2"><text:span text:style-name="Strong_20_Emphasis"><text:span text:style-name="T217">Ssh into zabbix-one, and activate : <text:tab/>systemctl stop zabbix-server<text:line-break/><text:line-break/></text:span></text:span><text:span text:style-name="Strong_20_Emphasis"><text:span text:style-name="T218">You should see (like in step 2), under system information, that the </text:span></text:span><text:span text:style-name="Strong_20_Emphasis"><text:span text:style-name="T219">zabbix nodes changed which one is active. </text:span></text:span></text:h>
      <text:h text:style-name="P123" text:outline-level="2">3.4 Ansible Structure</text:h>
      <text:p text:style-name="P37"/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1T12:00:15.404805797</meta:creation-date>
    <dc:date>2026-05-15T18:06:44.506768437</dc:date>
    <meta:editing-duration>PT20H14M18S</meta:editing-duration>
    <meta:editing-cycles>288</meta:editing-cycles>
    <meta:generator>LibreOffice/24.2.7.2$Linux_X86_64 LibreOffice_project/420$Build-2</meta:generator>
    <meta:document-statistic meta:table-count="0" meta:image-count="0" meta:object-count="0" meta:page-count="12" meta:paragraph-count="231" meta:word-count="1774" meta:character-count="15038" meta:non-whitespace-character-count="13019"/>
  </office:meta>
</office:document-meta>
</file>